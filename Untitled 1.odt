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216cm" table:align="left"/>
    </style:style>
    <style:style style:name="Table1.A" style:family="table-column">
      <style:table-column-properties style:column-width="3.272cm"/>
    </style:style>
    <style:style style:name="Table1.B" style:family="table-column">
      <style:table-column-properties style:column-width="2.649cm"/>
    </style:style>
    <style:style style:name="Table1.C" style:family="table-column">
      <style:table-column-properties style:column-width="3.29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767cm" table:align="left"/>
    </style:style>
    <style:style style:name="Table2.A" style:family="table-column">
      <style:table-column-properties style:column-width="2.928cm"/>
    </style:style>
    <style:style style:name="Table2.B" style:family="table-column">
      <style:table-column-properties style:column-width="5.83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195cm" table:align="left"/>
    </style:style>
    <style:style style:name="Table3.A" style:family="table-column">
      <style:table-column-properties style:column-width="2.325cm"/>
    </style:style>
    <style:style style:name="Table3.B" style:family="table-column">
      <style:table-column-properties style:column-width="4.8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5.824cm" table:align="left"/>
    </style:style>
    <style:style style:name="Table4.A" style:family="table-column">
      <style:table-column-properties style:column-width="3.025cm"/>
    </style:style>
    <style:style style:name="Table4.B" style:family="table-column">
      <style:table-column-properties style:column-width="2.799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Heading_20_5">
      <style:text-properties loext:padding="0cm" loext:border="none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loext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>
      <style:paragraph-properties fo:margin-top="0cm" fo:margin-bottom="0cm" loext:contextual-spacing="false"/>
    </style:style>
    <style:style style:name="P30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P31" style:family="paragraph" style:parent-style-name="Text_20_body">
      <style:paragraph-properties fo:margin-top="0cm" fo:margin-bottom="0cm" loext:contextual-spacing="false" fo:orphans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hatgpt.com/?prompt-textarea=#main" text:style-name="Internet_20_link" text:visited-style-name="Visited_20_Internet_20_Link">Skip to content</text:a></text:p>
      <text:section text:style-name="Sect1" text:name="thread">
        <text:h text:style-name="P1" text:outline-level="5">You said:</text:h>
        <text:p text:style-name="P30">Using cached datasets-3.1.0-py3-none-any.whl.metadata (20 kB) Collecting accelerate (from -r requirements.txt (line 6)) Using cached accelerate-1.0.1-py3-none-any.whl.metadata (19 kB) Collecting sentencepiece (from -r requirements.txt (line 7)) Using cached sentencepiece-0.2.0-cp38-cp38-manylinux_2_17_x86_64.manylinux2014_x86_64.whl.metadata (7.7 kB) Collecting tqdm (from -r requirements.txt (line 8)) Using cached tqdm-4.67.1-py3-none-any.whl.metadata (57 kB) Collecting mamba-ssm (from -r requirements.txt (line 9)) Downloading mamba_ssm-2.2.2.tar.gz (85 kB) Installing build dependencies ... done Getting requirements to build wheel ... error error: subprocess-exited-with-error × Getting requirements to build wheel did not run successfully. │ exit code: 1 ╰─&gt; [17 lines of output] Traceback (most recent call last): File "/home/pvg/Desktop/KairosAI/backend/venv/lib/python3.8/site-packages/pip/_vendor/pyproject_hooks/_in_process/_in_process.py", line 389, in &lt;module&gt; main() File "/home/pvg/Desktop/KairosAI/backend/venv/lib/python3.8/site-packages/pip/_vendor/pyproject_hooks/_in_process/_in_process.py", line 373, in main json_out["return_val"] = hook(**hook_input["kwargs"]) File "/home/pvg/Desktop/KairosAI/backend/venv/lib/python3.8/site-packages/pip/_vendor/pyproject_hooks/_in_process/_in_process.py", line 143, in get_requires_for_build_wheel return hook(config_settings) File "/tmp/pip-build-env-pbln50n0/overlay/lib/python3.8/site-packages/setuptools/build_meta.py", line 333, in get_requires_for_build_wheel return self._get_build_requires(config_settings, requirements=[]) File "/tmp/pip-build-env-pbln50n0/overlay/lib/python3.8/site-packages/setuptools/build_meta.py", line 303, in _get_build_requires self.run_setup() File "/tmp/pip-build-env-pbln50n0/overlay/lib/python3.8/site-packages/setuptools/build_meta.py", line 521, in run_setup super().run_setup(setup_script=setup_script) File "/tmp/pip-build-env-pbln50n0/overlay/lib/python3.8/site-packages/setuptools/build_meta.py", line 319, in run_setup exec(code, locals()) File "&lt;string&gt;", line 19, in &lt;module&gt; ModuleNotFoundError: No module named 'torch' [end of output] note: This error originates from a subprocess, and is likely not a problem with pip. error: subprocess-exited-with-error × Getting requirements to build wheel did not run successfully. │ exit code: 1 ╰─&gt; See above for output. note: This error originates from a subprocess, and is likely not a problem with pip. (venv) pvg@pvg-Precision-3660:~/Desktop/KairosAI/backend$ ^C (venv) pvg@pvg-Precision-3660:~/Desktop/KairosAI/backend$ ^C (venv) pvg@pvg-Precision-3660:~/Desktop/KairosAI/backend$ </text:p>
      </text:section>
      <text:h text:style-name="Heading_20_6" text:outline-level="6">ChatGPT said:</text:h>
      <text:p text:style-name="Text_20_body">You’re hitting a <text:span text:style-name="Strong_20_Emphasis">build-time dependency issue</text:span> with <text:span text:style-name="Source_20_Text">mamba-ssm</text:span>.</text:p>
      <text:h text:style-name="Heading_20_3" text:outline-level="3">What’s happening (root cause)</text:h>
      <text:p text:style-name="Text_20_body"><text:span text:style-name="Source_20_Text">mamba-ssm</text:span> <text:span text:style-name="Strong_20_Emphasis">requires PyTorch to be installed before it can even build its wheel</text:span>.</text:p>
      <text:p text:style-name="Text_20_body">During this step:</text:p>
      <text:p text:style-name="P3"><text:span text:style-name="Source_20_Text">Getting requirements to build wheel</text:span></text:p>
      <text:p text:style-name="Text_20_body">Python tries to execute <text:span text:style-name="Source_20_Text">mamba-ssm</text:span>’s <text:span text:style-name="Source_20_Text">setup.py</text:span>, which imports <text:span text:style-name="Source_20_Text">torch</text:span>.<text:line-break/>But in your virtual environment:</text:p>
      <text:p text:style-name="P3"><text:soft-page-break/><text:span text:style-name="Source_20_Text">ModuleNotFoundError: No module named 'torch'</text:span></text:p>
      <text:p text:style-name="Text_20_body">So the build fails <text:span text:style-name="Strong_20_Emphasis">before pip can install anything else</text:span>.</text:p>
      <text:p text:style-name="Text_20_body">This is a very common issue with PyTorch-based libraries.</text:p>
      <text:p text:style-name="Horizontal_20_Line"/>
      <text:h text:style-name="Heading_20_3" text:outline-level="3">✅ Correct installation order (important)</text:h>
      <text:p text:style-name="Text_20_body">You <text:span text:style-name="Strong_20_Emphasis">must install PyTorch first</text:span>, then install <text:span text:style-name="Source_20_Text">mamba-ssm</text:span>.</text:p>
      <text:h text:style-name="Heading_20_4" text:outline-level="4">1. Activate your venv (already done)</text:h>
      <text:p text:style-name="P3"><text:span text:style-name="Source_20_Text">source venv/bin/activate</text:span></text:p>
      <text:h text:style-name="Heading_20_4" text:outline-level="4">2. Install PyTorch <text:span text:style-name="Strong_20_Emphasis">explicitly</text:span></text:h>
      <text:p text:style-name="Text_20_body">Pick <text:span text:style-name="Strong_20_Emphasis">one</text:span> option depending on your system.</text:p>
      <text:h text:style-name="Heading_20_5" text:outline-level="5">✅ CPU-only (most common &amp; safest)</text:h>
      <text:p text:style-name="P3"><text:span text:style-name="Source_20_Text">pip install torch torchvision torchaudio</text:span></text:p>
      <text:h text:style-name="Heading_20_5" text:outline-level="5">✅ CUDA (only if you know your CUDA version)</text:h>
      <text:p text:style-name="Text_20_body">Example for CUDA 11.8:</text:p>
      <text:p text:style-name="P3"><text:span text:style-name="Source_20_Text">pip install torch torchvision torchaudio --index-url https://download.pytorch.org/whl/cu118</text:span></text:p>
      <text:p text:style-name="Text_20_body">You can verify:</text:p>
      <text:p text:style-name="P3"><text:span text:style-name="Source_20_Text">python -c "import torch; print(torch.__version__)"</text:span></text:p>
      <text:p text:style-name="Horizontal_20_Line"/>
      <text:h text:style-name="Heading_20_4" text:outline-level="4">3. Now install the remaining requirements</text:h>
      <text:p text:style-name="P3"><text:span text:style-name="Source_20_Text">pip install -r requirements.txt</text:span></text:p>
      <text:p text:style-name="Text_20_body"><text:span text:style-name="Source_20_Text">mamba-ssm</text:span> should now build successfully.</text:p>
      <text:p text:style-name="Horizontal_20_Line"/>
      <text:h text:style-name="Heading_20_3" text:outline-level="3">⚠️ Python version note (important)</text:h>
      <text:p text:style-name="Text_20_body">You are using <text:span text:style-name="Strong_20_Emphasis">Python 3.8</text:span>:</text:p>
      <text:p text:style-name="P3"><text:span text:style-name="Source_20_Text">sentencepiece-0.2.0-cp38-cp38</text:span></text:p>
      <text:p text:style-name="Text_20_body">That’s still supported, but:</text:p>
      <text:list xml:id="list2895495604" text:style-name="L1">
        <text:list-item>
          <text:p text:style-name="P4"><text:span text:style-name="Source_20_Text">mamba-ssm</text:span> builds <text:span text:style-name="Strong_20_Emphasis">much more reliably on Python 3.9–3.11</text:span></text:p>
        </text:list-item>
        <text:list-item>
          <text:p text:style-name="P4">If you hit compiler/CUDA issues later, upgrading Python is often the fix</text:p>
        </text:list-item>
      </text:list>
      <text:p text:style-name="Text_20_body">Recommended (if possible):</text:p>
      <text:p text:style-name="P3"><text:span text:style-name="Source_20_Text">python3.10 -m venv venv</text:span></text:p>
      <text:p text:style-name="Horizontal_20_Line"><text:soft-page-break/></text:p>
      <text:h text:style-name="Heading_20_3" text:outline-level="3">If it STILL fails (backup fixes)</text:h>
      <text:h text:style-name="Heading_20_4" text:outline-level="4">Option 1: Upgrade build tools</text:h>
      <text:p text:style-name="P3"><text:span text:style-name="Source_20_Text">pip install --upgrade pip setuptools wheel</text:span></text:p>
      <text:h text:style-name="Heading_20_4" text:outline-level="4">Option 2: Force no build isolation</text:h>
      <text:p text:style-name="P3"><text:span text:style-name="Source_20_Text">pip install mamba-ssm --no-build-isolation</text:span></text:p>
      <text:p text:style-name="Horizontal_20_Line"/>
      <text:h text:style-name="Heading_20_3" text:outline-level="3">Summary</text:h>
      <text:p text:style-name="Text_20_body"><text:span text:style-name="Strong_20_Emphasis">Why it failed</text:span></text:p>
      <text:list xml:id="list4212759429" text:style-name="L2">
        <text:list-item>
          <text:p text:style-name="P5"><text:span text:style-name="Source_20_Text">mamba-ssm</text:span> imports <text:span text:style-name="Source_20_Text">torch</text:span> during build</text:p>
        </text:list-item>
        <text:list-item>
          <text:p text:style-name="P5">PyTorch was not installed yet</text:p>
        </text:list-item>
      </text:list>
      <text:p text:style-name="Text_20_body"><text:span text:style-name="Strong_20_Emphasis">Fix</text:span></text:p>
      <text:list xml:id="list350146951" text:style-name="L3">
        <text:list-item>
          <text:p text:style-name="P6">Install <text:span text:style-name="Source_20_Text">torch</text:span> first</text:p>
        </text:list-item>
        <text:list-item>
          <text:p text:style-name="P6">Then install <text:span text:style-name="Source_20_Text">requirements.txt</text:span></text:p>
        </text:list-item>
      </text:list>
      <text:p text:style-name="Text_20_body">If you want, paste your <text:span text:style-name="Strong_20_Emphasis"><text:span text:style-name="Source_20_Text">requirements.txt</text:span></text:span> here and I’ll reorder it correctly so this never happens again.</text:p>
      <text:h text:style-name="Heading_20_5" text:outline-level="5">You said:</text:h>
      <text:p text:style-name="Text_20_body">(venv) pvg@pvg-Precision-3660:~/Desktop/KairosAI/backend$ nvidia-smi Thu Jan 22 15:52:28 2026 +-----------------------------------------------------------------------------------------+ | NVIDIA-SMI 575.57.08 Driver Version: 575.57.08 CUDA Version: 12.9 | |-----------------------------------------+------------------------+----------------------+ | GPU Name Persistence-M | Bus-Id Disp.A | Volatile Uncorr. ECC | | Fan Temp Perf Pwr:Usage/Cap | Memory-Usage | GPU-Util Compute M. | | | | MIG M. | |=========================================+========================+======================| | 0 NVIDIA GeForce RTX 4060 Ti Off | 00000000:01:00.0 On | N/A | | 0% 43C P8 11W / 165W | 493MiB / 16380MiB | 0% Default | | | | N/A | +-----------------------------------------+------------------------+----------------------+ +-----------------------------------------------------------------------------------------+ | Processes: | | GPU GI CI PID Type Process name GPU Memory | | ID ID Usage | |=========================================================================================| | 0 N/A N/A 1239 G /usr/lib/xorg/Xorg 55MiB | | 0 N/A N/A 1379 G /usr/bin/gnome-shell 7MiB | | 0 N/A N/A 2187 G /usr/lib/xorg/Xorg 90MiB | | 0 N/A N/A 2314 G /usr/bin/gnome-shell 95MiB | | 0 N/A N/A 4055 G /usr/lib/firefox/firefox 161MiB | +-----------------------------------------------------------------------------------------+ check this and give solution</text:p>
      <text:h text:style-name="Heading_20_6" text:outline-level="6"><text:soft-page-break/>ChatGPT said:</text:h>
      <text:p text:style-name="Text_20_body">Perfect — this output is exactly what we needed 👍<text:line-break/>You have a <text:span text:style-name="Strong_20_Emphasis">very new NVIDIA stack</text:span>, and that explains what you should (and should NOT) do next.</text:p>
      <text:p text:style-name="Horizontal_20_Line"/>
      <text:h text:style-name="Heading_20_2" text:outline-level="2">What your <text:span text:style-name="Source_20_Text">nvidia-smi</text:span> tells us</text:h>
      <text:p text:style-name="Text_20_body">Key lines:</text:p>
      <text:p text:style-name="P2"><text:span text:style-name="Source_20_Text">Driver Version: 575.57.08</text:span></text:p>
      <text:p text:style-name="P2"><text:span text:style-name="Source_20_Text">CUDA Version: 12.9</text:span></text:p>
      <text:p text:style-name="P3"><text:span text:style-name="Source_20_Text">GPU: RTX 4060 Ti</text:span></text:p>
      <text:h text:style-name="Heading_20_3" text:outline-level="3">Important implications</text:h>
      <text:list xml:id="list2619028619" text:style-name="L4">
        <text:list-item>
          <text:p text:style-name="P7"><text:span text:style-name="Strong_20_Emphasis">CUDA 12.9 is newer than what PyTorch officially ships wheels for</text:span></text:p>
          <text:list>
            <text:list-item>
              <text:p text:style-name="P7">PyTorch currently provides prebuilt wheels up to <text:span text:style-name="Strong_20_Emphasis">CUDA 12.1 / 12.4</text:span></text:p>
            </text:list-item>
            <text:list-item>
              <text:p text:style-name="P7">There is <text:span text:style-name="Strong_20_Emphasis">no torch-cu129 wheel</text:span></text:p>
            </text:list-item>
          </text:list>
        </text:list-item>
        <text:list-item>
          <text:p text:style-name="P7"><text:span text:style-name="Strong_20_Emphasis">This is NOT a problem</text:span></text:p>
          <text:list>
            <text:list-item>
              <text:p text:style-name="P7">NVIDIA drivers are <text:span text:style-name="Strong_20_Emphasis">backward compatible</text:span></text:p>
            </text:list-item>
            <text:list-item>
              <text:p text:style-name="P7">A CUDA 12.1 or 12.4 PyTorch build will run perfectly on a 12.9 driver</text:p>
            </text:list-item>
          </text:list>
        </text:list-item>
      </text:list>
      <text:p text:style-name="Text_20_body">✅ This is expected and safe.</text:p>
      <text:p text:style-name="Horizontal_20_Line"/>
      <text:h text:style-name="Heading_20_2" text:outline-level="2">✅ Correct solution (do this exactly)</text:h>
      <text:h text:style-name="Heading_20_3" text:outline-level="3">1. Make sure your venv is active</text:h>
      <text:p text:style-name="P3"><text:span text:style-name="Source_20_Text">source venv/bin/activate</text:span></text:p>
      <text:p text:style-name="Horizontal_20_Line"/>
      <text:h text:style-name="Heading_20_3" text:outline-level="3">2. Install PyTorch with CUDA support (recommended)</text:h>
      <text:p text:style-name="Text_20_body">Use <text:span text:style-name="Strong_20_Emphasis">CUDA 12.1</text:span>, which is the most stable choice right now:</text:p>
      <text:p text:style-name="P3"><text:span text:style-name="Source_20_Text">pip install torch torchvision torchaudio --index-url https://download.pytorch.org/whl/cu121</text:span></text:p>
      <text:p text:style-name="Text_20_body">👉 This <text:span text:style-name="Strong_20_Emphasis">does NOT install CUDA system-wide</text:span><text:line-break/>👉 It only installs CUDA runtime libraries bundled with PyTorch</text:p>
      <text:p text:style-name="Horizontal_20_Line"/>
      <text:h text:style-name="Heading_20_3" text:outline-level="3">3. Verify PyTorch sees your GPU</text:h>
      <text:p text:style-name="P2"><text:span text:style-name="Source_20_Text">python - &lt;&lt;'EOF'</text:span></text:p>
      <text:p text:style-name="P2"><text:span text:style-name="Source_20_Text">import torch</text:span></text:p>
      <text:p text:style-name="P2"><text:span text:style-name="Source_20_Text">print("Torch version:", torch.__version__)</text:span></text:p>
      <text:p text:style-name="P2"><text:span text:style-name="Source_20_Text">print("CUDA available:", torch.cuda.is_available())</text:span></text:p>
      <text:p text:style-name="P2"><text:soft-page-break/><text:span text:style-name="Source_20_Text">print("CUDA device:", torch.cuda.get_device_name(0))</text:span></text:p>
      <text:p text:style-name="P3"><text:span text:style-name="Source_20_Text">EOF</text:span></text:p>
      <text:p text:style-name="Text_20_body">Expected output:</text:p>
      <text:list xml:id="list2664660048" text:style-name="L5">
        <text:list-item>
          <text:p text:style-name="P8"><text:span text:style-name="Source_20_Text">CUDA available: True</text:span></text:p>
        </text:list-item>
        <text:list-item>
          <text:p text:style-name="P8"><text:span text:style-name="Source_20_Text">NVIDIA GeForce RTX 4060 Ti</text:span></text:p>
        </text:list-item>
      </text:list>
      <text:p text:style-name="Horizontal_20_Line"/>
      <text:h text:style-name="Heading_20_3" text:outline-level="3">4. Now install the rest of your requirements</text:h>
      <text:p text:style-name="P3"><text:span text:style-name="Source_20_Text">pip install -r requirements.txt</text:span></text:p>
      <text:p text:style-name="Text_20_body"><text:span text:style-name="Source_20_Text">mamba-ssm</text:span> should now build successfully.</text:p>
      <text:p text:style-name="Horizontal_20_Line"/>
      <text:h text:style-name="Heading_20_2" text:outline-level="2">⚠️ VERY IMPORTANT: Do NOT do these</text:h>
      <text:p text:style-name="Text_20_body">❌ Do <text:span text:style-name="Strong_20_Emphasis">NOT</text:span> try to install CUDA 12.9 toolkit<text:line-break/>❌ Do <text:span text:style-name="Strong_20_Emphasis">NOT</text:span> compile PyTorch from source<text:line-break/>❌ Do <text:span text:style-name="Strong_20_Emphasis">NOT</text:span> downgrade NVIDIA drivers</text:p>
      <text:p text:style-name="Text_20_body">Your system is already <text:span text:style-name="Strong_20_Emphasis">better than required</text:span>.</text:p>
      <text:p text:style-name="Horizontal_20_Line"/>
      <text:h text:style-name="Heading_20_2" text:outline-level="2">If <text:span text:style-name="Source_20_Text">mamba-ssm</text:span> still fails (rare but possible)</text:h>
      <text:p text:style-name="Text_20_body">Run:</text:p>
      <text:p text:style-name="P3"><text:span text:style-name="Source_20_Text">pip install mamba-ssm --no-build-isolation</text:span></text:p>
      <text:p text:style-name="Text_20_body">If that still fails, install build deps:</text:p>
      <text:p text:style-name="P3"><text:span text:style-name="Source_20_Text">sudo apt install build-essential ninja-build</text:span></text:p>
      <text:p text:style-name="Text_20_body">Then retry.</text:p>
      <text:p text:style-name="Horizontal_20_Line"/>
      <text:h text:style-name="Heading_20_2" text:outline-level="2">Summary (TL;DR)</text:h>
      <text:list xml:id="list3780329318" text:style-name="L6">
        <text:list-item>
          <text:p text:style-name="P9">✅ RTX 4060 Ti → fully supported</text:p>
        </text:list-item>
        <text:list-item>
          <text:p text:style-name="P9">✅ Driver 575 / CUDA 12.9 → <text:span text:style-name="Strong_20_Emphasis">fine</text:span></text:p>
        </text:list-item>
        <text:list-item>
          <text:p text:style-name="P9">✅ Use <text:span text:style-name="Strong_20_Emphasis">PyTorch CUDA 12.1 wheel</text:span></text:p>
        </text:list-item>
        <text:list-item>
          <text:p text:style-name="P9">✅ Install <text:span text:style-name="Source_20_Text">torch</text:span> <text:span text:style-name="Strong_20_Emphasis">before</text:span> <text:span text:style-name="Source_20_Text">mamba-ssm</text:span></text:p>
        </text:list-item>
      </text:list>
      <text:p text:style-name="Text_20_body">If you want, paste your <text:span text:style-name="Strong_20_Emphasis">full </text:span><text:span text:style-name="Strong_20_Emphasis"><text:span text:style-name="Source_20_Text">requirements.txt</text:span></text:span> and I’ll:</text:p>
      <text:list xml:id="list2938347866" text:style-name="L7">
        <text:list-item>
          <text:p text:style-name="P10">reorder it correctly</text:p>
        </text:list-item>
        <text:list-item>
          <text:p text:style-name="P10"><text:soft-page-break/>pin compatible versions</text:p>
        </text:list-item>
        <text:list-item>
          <text:p text:style-name="P10">make it reproducible for teammates / deployment</text:p>
        </text:list-item>
      </text:list>
      <text:h text:style-name="Heading_20_5" text:outline-level="5">You said:</text:h>
      <text:p text:style-name="Text_20_body">v) pvg@pvg-Precision-3660:~/Desktop/KairosAI/backend$ source venv/bin/activate (venv) pvg@pvg-Precision-3660:~/Desktop/KairosAI/backend$ pip install torch torchvision --index-url https://download.pytorch.org/whl/cu121 Looking in indexes: https://download.pytorch.org/whl/cu121 Collecting torch Using cached https://download.pytorch.org/whl/cu121/torch-2.4.1%2Bcu121-cp38-cp38-linux_x86_64.whl (798.9 MB) Collecting torchvision Using cached https://download.pytorch.org/whl/cu121/torchvision-0.19.1%2Bcu121-cp38-cp38-linux_x86_64.whl (7.1 MB) Collecting filelock (from torch) Downloading filelock-3.16.1-py3-none-any.whl.metadata (2.9 kB) Collecting typing-extensions&gt;=4.8.0 (from torch) Downloading https://download.pytorch.org/whl/typing_extensions-4.15.0-py3-none-any.whl.metadata (3.3 kB) Collecting sympy (from torch) Downloading sympy-1.13.3-py3-none-any.whl.metadata (12 kB) Collecting networkx (from torch) Downloading networkx-3.1-py3-none-any.whl.metadata (5.3 kB) Collecting jinja2 (from torch) Downloading https://download.pytorch.org/whl/jinja2-3.1.6-py3-none-any.whl.metadata (2.9 kB) Collecting fsspec (from torch) Downloading fsspec-2025.3.0-py3-none-any.whl.metadata (11 kB) Collecting nvidia-cuda-nvrtc-cu12==12.1.105 (from torch) Using cached https://download.pytorch.org/whl/cu121/nvidia_cuda_nvrtc_cu12-12.1.105-py3-none-manylinux1_x86_64.whl (23.7 MB) Collecting nvidia-cuda-runtime-cu12==12.1.105 (from torch) Using cached https://download.pytorch.org/whl/cu121/nvidia_cuda_runtime_cu12-12.1.105-py3-none-manylinux1_x86_64.whl (823 kB) Collecting nvidia-cuda-cupti-cu12==12.1.105 (from torch) Using cached https://download.pytorch.org/whl/cu121/nvidia_cuda_cupti_cu12-12.1.105-py3-none-manylinux1_x86_64.whl (14.1 MB) Collecting nvidia-cudnn-cu12==9.1.0.70 (from torch) Using cached https://download.pytorch.org/whl/cu121/nvidia_cudnn_cu12-9.1.0.70-py3-none-manylinux2014_x86_64.whl (664.8 MB) Collecting nvidia-cublas-cu12==12.1.3.1 (from torch) Using cached https://download.pytorch.org/whl/cu121/nvidia_cublas_cu12-12.1.3.1-py3-none-manylinux1_x86_64.whl (410.6 MB) Collecting nvidia-cufft-cu12==11.0.2.54 (from torch) Using cached https://download.pytorch.org/whl/cu121/nvidia_cufft_cu12-11.0.2.54-py3-none-manylinux1_x86_64.whl (121.6 MB) Collecting nvidia-curand-cu12==10.3.2.106 (from torch) Using cached https://download.pytorch.org/whl/cu121/nvidia_curand_cu12-10.3.2.106-py3-none-manylinux1_x86_64.whl (56.5 MB) Collecting nvidia-cusolver-cu12==11.4.5.107 (from torch) Using cached https://download.pytorch.org/whl/cu121/nvidia_cusolver_cu12-11.4.5.107-py3-none-manylinux1_x86_64.whl (124.2 MB) Collecting nvidia-cusparse-cu12==12.1.0.106 (from torch) Using cached https://download.pytorch.org/whl/cu121/nvidia_cusparse_cu12-12.1.0.106-py3-none-manylinux1_x86_64.whl (196.0 MB) Collecting nvidia-nccl-cu12==2.20.5 (from torch) Using cached https://download.pytorch.org/whl/cu121/nvidia_nccl_cu12-2.20.5-py3-none-manylinux2014_x86_64.whl (176.2 MB) Collecting nvidia-nvtx-cu12==12.1.105 (from torch) Using cached https://download.pytorch.org/whl/cu121/nvidia_nvtx_cu12-12.1.105-py3-none-manylinux1_x86_64.whl (99 kB) Collecting triton==3.0.0 (from torch) Using cached https://download.pytorch.org/whl/triton-3.0.0-1-cp38-cp38-manylinux2014_x86_64.manylinux_2_17_x86_64.whl (209.4 MB) Collecting nvidia-nvjitlink-cu12 (from nvidia-cusolver-cu12==11.4.5.107-&gt;torch) Using cached https://download.pytorch.org/whl/nvidia_nvjitlink_cu12-12.9.86-py3-none-<text:soft-page-break/>manylinux2010_x86_64.manylinux_2_12_x86_64.whl.metadata (1.7 kB) Collecting numpy (from torchvision) Using cached numpy-1.24.4-cp38-cp38-manylinux_2_17_x86_64.manylinux2014_x86_64.whl.metadata (5.6 kB) Collecting pillow!=8.3.*,&gt;=5.3.0 (from torchvision) Using cached pillow-10.4.0-cp38-cp38-manylinux_2_28_x86_64.whl.metadata (9.2 kB) INFO: pip is looking at multiple versions of typing-extensions to determine which version is compatible with other requirements. This could take a while. Collecting typing-extensions&gt;=4.8.0 (from torch) Downloading https://download.pytorch.org/whl/typing_extensions-4.14.0-py3-none-any.whl.metadata (3.0 kB) Using cached https://download.pytorch.org/whl/typing_extensions-4.12.2-py3-none-any.whl.metadata (3.0 kB) Collecting MarkupSafe&gt;=2.0 (from jinja2-&gt;torch) Using cached https://download.pytorch.org/whl/MarkupSafe-2.1.5-cp38-cp38-manylinux_2_17_x86_64.manylinux2014_x86_64.whl (26 kB) Collecting mpmath&lt;1.4,&gt;=1.1.0 (from sympy-&gt;torch) Downloading mpmath-1.3.0-py3-none-any.whl.metadata (8.6 kB) Using cached pillow-10.4.0-cp38-cp38-manylinux_2_28_x86_64.whl (4.5 MB) Using cached https://download.pytorch.org/whl/typing_extensions-4.12.2-py3-none-any.whl (37 kB) Downloading filelock-3.16.1-py3-none-any.whl (16 kB) Downloading fsspec-2025.3.0-py3-none-any.whl (193 kB) Downloading https://download.pytorch.org/whl/jinja2-3.1.6-py3-none-any.whl (134 kB) Downloading networkx-3.1-py3-none-any.whl (2.1 MB) ━━━━━━━━━━━━━━━━━━━━━━━━━━━━━━━━━━━━━━━━ 2.1/2.1 MB 14.8 MB/s eta 0:00:00 Using cached numpy-1.24.4-cp38-cp38-manylinux_2_17_x86_64.manylinux2014_x86_64.whl (17.3 MB) Downloading sympy-1.13.3-py3-none-any.whl (6.2 MB) ━━━━━━━━━━━━━━━━━━━━━━━━━━━━━━━━━━━━━━━━ 6.2/6.2 MB 35.0 MB/s eta 0:00:00 Downloading mpmath-1.3.0-py3-none-any.whl (536 kB) ━━━━━━━━━━━━━━━━━━━━━━━━━━━━━━━━━━━━━━━━ 536.2/536.2 kB 4.1 MB/s eta 0:00:00 Using cached https://download.pytorch.org/whl/nvidia_nvjitlink_cu12-12.9.86-py3-none-manylinux2010_x86_64.manylinux_2_12_x86_64.whl (39.7 MB) Installing collected packages: mpmath, typing-extensions, sympy, pillow, nvidia-nvtx-cu12, nvidia-nvjitlink-cu12, nvidia-nccl-cu12, nvidia-curand-cu12, nvidia-cufft-cu12, nvidia-cuda-runtime-cu12, nvidia-cuda-nvrtc-cu12, nvidia-cuda-cupti-cu12, nvidia-cublas-cu12, numpy, networkx, MarkupSafe, fsspec, filelock, triton, nvidia-cusparse-cu12, nvidia-cudnn-cu12, jinja2, nvidia-cusolver-cu12, torch, torchvision Successfully installed MarkupSafe-2.1.5 filelock-3.16.1 fsspec-2025.3.0 jinja2-3.1.6 mpmath-1.3.0 networkx-3.1 numpy-1.24.4 nvidia-cublas-cu12-12.1.3.1 nvidia-cuda-cupti-cu12-12.1.105 nvidia-cuda-nvrtc-cu12-12.1.105 nvidia-cuda-runtime-cu12-12.1.105 nvidia-cudnn-cu12-9.1.0.70 nvidia-cufft-cu12-11.0.2.54 nvidia-curand-cu12-10.3.2.106 nvidia-cusolver-cu12-11.4.5.107 nvidia-cusparse-cu12-12.1.0.106 nvidia-nccl-cu12-2.20.5 nvidia-nvjitlink-cu12-12.9.86 nvidia-nvtx-cu12-12.1.105 pillow-10.4.0 sympy-1.13.3 torch-2.4.1+cu121 torchvision-0.19.1+cu121 triton-3.0.0 typing-extensions-4.12.2 (venv) pvg@pvg-Precision-3660:~/Desktop/KairosAI/backend$ pip install -r requirements.txt Requirement already satisfied: torch in ./venv/lib/python3.8/site-packages (from -r requirements.txt (line 1)) (2.4.1+cu121) Requirement already satisfied: torchvision in ./venv/lib/python3.8/site-packages (from -r requirements.txt (line 2)) (0.19.1+cu121) Collecting torchaudio (from -r requirements.txt (line 3)) Using cached torchaudio-2.4.1-cp38-cp38-manylinux1_x86_64.whl.metadata (6.4 kB) Collecting transformers (from -r requirements.txt (line 4)) Using cached transformers-4.46.3-py3-none-any.whl.metadata (44 kB) Collecting datasets (from -r requirements.txt (line 5)) Using cached datasets-3.1.0-py3-none-any.whl.metadata (20 kB) Collecting accelerate (from -r requirements.txt (line 6)) Using cached accelerate-1.0.1-py3-none-any.whl.metadata (19 kB) Collecting sentencepiece (from -r requirements.txt (line 7)) Using cached <text:soft-page-break/>sentencepiece-0.2.0-cp38-cp38-manylinux_2_17_x86_64.manylinux2014_x86_64.whl.metadata (7.7 kB) Collecting tqdm (from -r requirements.txt (line 8)) Using cached tqdm-4.67.1-py3-none-any.whl.metadata (57 kB) Collecting mamba-ssm (from -r requirements.txt (line 9)) Using cached mamba_ssm-2.2.2.tar.gz (85 kB) Installing build dependencies ... done Getting requirements to build wheel ... error error: subprocess-exited-with-error × Getting requirements to build wheel did not run successfully. │ exit code: 1 ╰─&gt; [17 lines of output] Traceback (most recent call last): File "/home/pvg/Desktop/KairosAI/backend/venv/lib/python3.8/site-packages/pip/_vendor/pyproject_hooks/_in_process/_in_process.py", line 389, in &lt;module&gt; main() File "/home/pvg/Desktop/KairosAI/backend/venv/lib/python3.8/site-packages/pip/_vendor/pyproject_hooks/_in_process/_in_process.py", line 373, in main json_out["return_val"] = hook(**hook_input["kwargs"]) File "/home/pvg/Desktop/KairosAI/backend/venv/lib/python3.8/site-packages/pip/_vendor/pyproject_hooks/_in_process/_in_process.py", line 143, in get_requires_for_build_wheel return hook(config_settings) File "/tmp/pip-build-env-f2_kpal5/overlay/lib/python3.8/site-packages/setuptools/build_meta.py", line 333, in get_requires_for_build_wheel return self._get_build_requires(config_settings, requirements=[]) File "/tmp/pip-build-env-f2_kpal5/overlay/lib/python3.8/site-packages/setuptools/build_meta.py", line 303, in _get_build_requires self.run_setup() File "/tmp/pip-build-env-f2_kpal5/overlay/lib/python3.8/site-packages/setuptools/build_meta.py", line 521, in run_setup super().run_setup(setup_script=setup_script) File "/tmp/pip-build-env-f2_kpal5/overlay/lib/python3.8/site-packages/setuptools/build_meta.py", line 319, in run_setup exec(code, locals()) File "&lt;string&gt;", line 19, in &lt;module&gt; ModuleNotFoundError: No module named 'torch' [end of output] note: This error originates from a subprocess, and is likely not a problem with pip. error: subprocess-exited-with-error × Getting requirements to build wheel did not run successfully. │ exit code: 1 ╰─&gt; See above for output. note: This error originates from a subprocess, and is likely not a problem with pip. (venv) pvg@pvg-Precision-3660:~/Desktop/KairosAI/backend$ pip install mamba-ssm --no-build-isolation Collecting mamba-ssm Using cached mamba_ssm-2.2.2.tar.gz (85 kB) Preparing metadata (pyproject.toml) ... error error: subprocess-exited-with-error × Preparing metadata (pyproject.toml) did not run successfully. │ exit code: 1 ╰─&gt; [16 lines of output] Traceback (most recent call last): File "/home/pvg/Desktop/KairosAI/backend/venv/lib/python3.8/site-packages/pip/_vendor/pyproject_hooks/_in_process/_in_process.py", line 389, in &lt;module&gt; main() File "/home/pvg/Desktop/KairosAI/backend/venv/lib/python3.8/site-packages/pip/_vendor/pyproject_hooks/_in_process/_in_process.py", line 373, in main json_out["return_val"] = hook(**hook_input["kwargs"]) File "/home/pvg/Desktop/KairosAI/backend/venv/lib/python3.8/site-packages/pip/_vendor/pyproject_hooks/_in_process/_in_process.py", line 175, in prepare_metadata_for_build_wheel return hook(metadata_directory, config_settings) File "/home/pvg/Desktop/KairosAI/backend/venv/lib/python3.8/site-packages/setuptools/build_meta.py", line 156, in prepare_metadata_for_build_wheel self.run_setup() File "/home/pvg/Desktop/KairosAI/backend/venv/lib/python3.8/site-packages/setuptools/build_meta.py", line 236, in run_setup super(_BuildMetaLegacyBackend, File "/home/pvg/Desktop/KairosAI/backend/venv/lib/python3.8/site-packages/setuptools/build_meta.py", line 142, in run_setup exec(compile(code, __file__, 'exec'), locals()) File "setup.py", line 8, in &lt;module&gt; from packaging.version import parse, Version <text:soft-page-break/>ModuleNotFoundError: No module named 'packaging' [end of output] note: This error originates from a subprocess, and is likely not a problem with pip. error: metadata-generation-failed × Encountered error while generating package metadata. ╰─&gt; See above for output. note: This is an issue with the package mentioned above, not pip. hint: See above for details. (venv) pvg@pvg-Precision-3660:~/Desktop/KairosAI/backend$ python - &lt;&lt;'EOF' &gt; import torch &gt; print("Torch version:", torch.__version__) &gt; print("CUDA available:", torch.cuda.is_available()) &gt; print("CUDA device:", torch.cuda.get_device_name(0)) &gt; EOF Torch version: 2.4.1+cu121 CUDA available: True CUDA device: NVIDIA GeForce RTX 4060 Ti (venv) pvg@pvg-Precision-3660:~/Desktop/KairosAI/backend$ </text:p>
      <text:h text:style-name="Heading_20_6" text:outline-level="6">ChatGPT said:</text:h>
      <text:p text:style-name="Text_20_body">Great, thanks for pasting the <text:span text:style-name="Strong_20_Emphasis">full log</text:span> — this makes the situation 100% clear now.<text:line-break/>You did <text:span text:style-name="Strong_20_Emphasis">everything right</text:span> on the PyTorch + CUDA side 👍<text:line-break/>The remaining failure is <text:span text:style-name="Strong_20_Emphasis">NOT your GPU, not CUDA, and not torch anymore</text:span>.</text:p>
      <text:p text:style-name="Horizontal_20_Line"/>
      <text:h text:style-name="Heading_20_2" text:outline-level="2">✅ Current state (what’s confirmed working)</text:h>
      <text:p text:style-name="Text_20_body">✔ PyTorch <text:span text:style-name="Strong_20_Emphasis">2.4.1 + CUDA 12.1</text:span> installed correctly<text:line-break/>✔ GPU is detected and usable<text:line-break/>✔ Driver / CUDA runtime is fine</text:p>
      <text:p text:style-name="Text_20_body">This part is <text:span text:style-name="Strong_20_Emphasis">DONE</text:span>:</text:p>
      <text:p text:style-name="P2"><text:span text:style-name="Source_20_Text">CUDA available: True</text:span></text:p>
      <text:p text:style-name="P3"><text:span text:style-name="Source_20_Text">CUDA device: NVIDIA GeForce RTX 4060 Ti</text:span></text:p>
      <text:p text:style-name="Horizontal_20_Line"/>
      <text:h text:style-name="Heading_20_2" text:outline-level="2">❌ Why <text:span text:style-name="Source_20_Text">mamba-ssm</text:span> is still failing</text:h>
      <text:p text:style-name="Text_20_body">There are <text:span text:style-name="Strong_20_Emphasis">two separate but related issues</text:span>, both caused by <text:span text:style-name="Strong_20_Emphasis">Python 3.8</text:span>.</text:p>
      <text:p text:style-name="Horizontal_20_Line"/>
      <text:h text:style-name="Heading_20_3" text:outline-level="3">1️⃣ <text:span text:style-name="Source_20_Text">pip</text:span> build isolation hides torch (first error)</text:h>
      <text:p text:style-name="Text_20_body">Even though <text:span text:style-name="Source_20_Text">torch</text:span> <text:span text:style-name="Strong_20_Emphasis">is installed</text:span>, pip builds <text:span text:style-name="Source_20_Text">mamba-ssm</text:span> in an <text:span text:style-name="Strong_20_Emphasis">isolated build environment</text:span>, where:</text:p>
      <text:p text:style-name="P3"><text:span text:style-name="Source_20_Text">ModuleNotFoundError: No module named 'torch'</text:span></text:p>
      <text:p text:style-name="Text_20_body">This is a known issue with <text:span text:style-name="Source_20_Text">mamba-ssm</text:span>’s <text:span text:style-name="Source_20_Text">pyproject.toml</text:span>.</text:p>
      <text:p text:style-name="Horizontal_20_Line"/>
      <text:h text:style-name="Heading_20_3" text:outline-level="3">2️⃣ Python 3.8 is now effectively unsupported by <text:span text:style-name="Source_20_Text">mamba-ssm</text:span></text:h>
      <text:p text:style-name="Text_20_body">Your second error confirms it:</text:p>
      <text:p text:style-name="P3"><text:span text:style-name="Source_20_Text">ModuleNotFoundError: No module named 'packaging'</text:span></text:p>
      <text:p text:style-name="Text_20_body">This happens because:</text:p>
      <text:list xml:id="list671858917" text:style-name="L8">
        <text:list-item>
          <text:p text:style-name="P11"><text:soft-page-break/><text:span text:style-name="Source_20_Text">mamba-ssm &gt;= 2.2.x</text:span></text:p>
        </text:list-item>
        <text:list-item>
          <text:p text:style-name="P11">assumes <text:span text:style-name="Strong_20_Emphasis">modern Python tooling</text:span></text:p>
        </text:list-item>
        <text:list-item>
          <text:p text:style-name="P11">expects dependencies that <text:span text:style-name="Strong_20_Emphasis">pip no longer injects automatically for Python 3.8</text:span></text:p>
        </text:list-item>
      </text:list>
      <text:p text:style-name="Text_20_body">In short:</text:p>
      <text:p text:style-name="Quotations"><text:span text:style-name="Strong_20_Emphasis">mamba-ssm is not reliably compatible with Python 3.8 anymore</text:span></text:p>
      <text:p text:style-name="Text_20_body">This is not documented clearly upstream, but it is well-known in practice.</text:p>
      <text:p text:style-name="Horizontal_20_Line"/>
      <text:h text:style-name="Heading_20_2" text:outline-level="2">✅ The REAL fix (recommended, clean, future-proof)</text:h>
      <text:h text:style-name="Heading_20_3" text:outline-level="3">🚀 Upgrade to Python <text:span text:style-name="Strong_20_Emphasis">3.10 or 3.11</text:span></text:h>
      <text:p text:style-name="Text_20_body">This will fix <text:span text:style-name="Strong_20_Emphasis">both</text:span>:</text:p>
      <text:list xml:id="list1815806381" text:style-name="L9">
        <text:list-item>
          <text:p text:style-name="P12">torch visibility during build</text:p>
        </text:list-item>
        <text:list-item>
          <text:p text:style-name="P12">missing <text:span text:style-name="Source_20_Text">packaging</text:span> / PEP517 issues</text:p>
        </text:list-item>
        <text:list-item>
          <text:p text:style-name="P12">future transformer / accelerate issues</text:p>
        </text:list-item>
      </text:list>
      <text:h text:style-name="Heading_20_3" text:outline-level="3">Step-by-step (safe &amp; clean)</text:h>
      <text:h text:style-name="Heading_20_4" text:outline-level="4">1. Install Python 3.10 (system)</text:h>
      <text:p text:style-name="P3"><text:span text:style-name="Source_20_Text">sudo apt install python3.10 python3.10-venv python3.10-dev</text:span></text:p>
      <text:p text:style-name="Horizontal_20_Line"/>
      <text:h text:style-name="Heading_20_4" text:outline-level="4">2. Create a NEW venv</text:h>
      <text:p text:style-name="P2"><text:span text:style-name="Source_20_Text">cd ~/Desktop/KairosAI/backend</text:span></text:p>
      <text:p text:style-name="P2"><text:span text:style-name="Source_20_Text">python3.10 -m venv venv310</text:span></text:p>
      <text:p text:style-name="P3"><text:span text:style-name="Source_20_Text">source venv310/bin/activate</text:span></text:p>
      <text:p text:style-name="Horizontal_20_Line"/>
      <text:h text:style-name="Heading_20_4" text:outline-level="4">3. Upgrade build tools</text:h>
      <text:p text:style-name="P3"><text:span text:style-name="Source_20_Text">pip install --upgrade pip setuptools wheel packaging</text:span></text:p>
      <text:p text:style-name="Horizontal_20_Line"/>
      <text:h text:style-name="Heading_20_4" text:outline-level="4">4. Install PyTorch (CUDA)</text:h>
      <text:p text:style-name="P3"><text:span text:style-name="Source_20_Text">pip install torch torchvision torchaudio --index-url https://download.pytorch.org/whl/cu121</text:span></text:p>
      <text:p text:style-name="Text_20_body">Verify:</text:p>
      <text:p text:style-name="P2"><text:span text:style-name="Source_20_Text">python - &lt;&lt;'EOF'</text:span></text:p>
      <text:p text:style-name="P2"><text:span text:style-name="Source_20_Text">import torch</text:span></text:p>
      <text:p text:style-name="P2"><text:span text:style-name="Source_20_Text">print(torch.__version__)</text:span></text:p>
      <text:p text:style-name="P2"><text:span text:style-name="Source_20_Text">print(torch.cuda.is_available())</text:span></text:p>
      <text:p text:style-name="P2"><text:soft-page-break/><text:span text:style-name="Source_20_Text">print(torch.cuda.get_device_name(0))</text:span></text:p>
      <text:p text:style-name="P3"><text:span text:style-name="Source_20_Text">EOF</text:span></text:p>
      <text:p text:style-name="Horizontal_20_Line"/>
      <text:h text:style-name="Heading_20_4" text:outline-level="4">5. Install requirements</text:h>
      <text:p text:style-name="P3"><text:span text:style-name="Source_20_Text">pip install -r requirements.txt</text:span></text:p>
      <text:p text:style-name="Text_20_body">👉 <text:span text:style-name="Strong_20_Emphasis"><text:span text:style-name="Source_20_Text">mamba-ssm</text:span></text:span><text:span text:style-name="Strong_20_Emphasis"> will now build successfully</text:span></text:p>
      <text:p text:style-name="Horizontal_20_Line"/>
      <text:h text:style-name="Heading_20_2" text:outline-level="2">⚠️ If you ABSOLUTELY must stay on Python 3.8 (not recommended)</text:h>
      <text:p text:style-name="Text_20_body">You can try this <text:span text:style-name="Strong_20_Emphasis">hacky workaround</text:span>, but I do NOT recommend it for production:</text:p>
      <text:p text:style-name="P2"><text:span text:style-name="Source_20_Text">pip install packaging ninja einops</text:span></text:p>
      <text:p text:style-name="P3"><text:span text:style-name="Source_20_Text">pip install mamba-ssm==2.1.0 --no-build-isolation</text:span></text:p>
      <text:p text:style-name="Text_20_body">⚠️ Even if it installs, <text:span text:style-name="Strong_20_Emphasis">future breakage is very likely</text:span>.</text:p>
      <text:p text:style-name="Horizontal_20_Line"/>
      <text:h text:style-name="Heading_20_2" text:outline-level="2">🧠 Why upgrading Python is the right call</text:h>
      <text:p text:style-name="Text_20_body">Your stack includes:</text:p>
      <text:list xml:id="list5490852" text:style-name="L10">
        <text:list-item>
          <text:p text:style-name="P13"><text:span text:style-name="Source_20_Text">torch 2.4</text:span></text:p>
        </text:list-item>
        <text:list-item>
          <text:p text:style-name="P13"><text:span text:style-name="Source_20_Text">transformers 4.46</text:span></text:p>
        </text:list-item>
        <text:list-item>
          <text:p text:style-name="P13"><text:span text:style-name="Source_20_Text">accelerate 1.0</text:span></text:p>
        </text:list-item>
        <text:list-item>
          <text:p text:style-name="P13"><text:span text:style-name="Source_20_Text">mamba-ssm 2.x</text:span></text:p>
        </text:list-item>
      </text:list>
      <text:p text:style-name="Text_20_body">These are <text:span text:style-name="Strong_20_Emphasis">2024–2025 era libraries</text:span>.<text:line-break/>Python 3.8 is EOL-adjacent and increasingly unsupported.</text:p>
      <text:p text:style-name="Text_20_body">✅ Python 3.10 is the <text:span text:style-name="Strong_20_Emphasis">sweet spot</text:span> for ML right now.</text:p>
      <text:p text:style-name="Horizontal_20_Line"/>
      <text:h text:style-name="Heading_20_2" text:outline-level="2">✅ Final recommendation (TL;DR)</text:h>
      <text:list xml:id="list2579718663" text:style-name="L11">
        <text:list-item>
          <text:p text:style-name="P14">❌ Stop fighting <text:span text:style-name="Source_20_Text">mamba-ssm</text:span> on Python 3.8</text:p>
        </text:list-item>
        <text:list-item>
          <text:p text:style-name="P14">✅ Create a Python <text:span text:style-name="Strong_20_Emphasis">3.10 venv</text:span></text:p>
        </text:list-item>
        <text:list-item>
          <text:p text:style-name="P14">✅ Reinstall torch + requirements</text:p>
        </text:list-item>
        <text:list-item>
          <text:p text:style-name="P14">✅ Everything will work cleanly</text:p>
        </text:list-item>
      </text:list>
      <text:p text:style-name="Text_20_body">If you want, paste your <text:span text:style-name="Strong_20_Emphasis"><text:span text:style-name="Source_20_Text">requirements.txt</text:span></text:span> and I’ll:</text:p>
      <text:list xml:id="list1331757848" text:style-name="L12">
        <text:list-item>
          <text:p text:style-name="P15">pin versions optimally for Python 3.10</text:p>
        </text:list-item>
        <text:list-item>
          <text:p text:style-name="P15"><text:soft-page-break/>remove landmines</text:p>
        </text:list-item>
        <text:list-item>
          <text:p text:style-name="P15">make it deployment-safe (Docker / server-ready)</text:p>
        </text:list-item>
      </text:list>
      <text:h text:style-name="Heading_20_5" text:outline-level="5">You said:</text:h>
      <text:p text:style-name="Text_20_body">Reading state information... Done E: Unable to locate package python3.10 E: Couldn't find any package by glob 'python3.10' E: Unable to locate package python3.10-venv E: Couldn't find any package by glob 'python3.10-venv' E: Unable to locate package python3.10-dev E: Couldn't find any package by glob 'python3.10-dev' (venv) pvg@pvg-Precision-3660:~/Desktop/KairosAI/backend$ </text:p>
      <text:h text:style-name="Heading_20_6" text:outline-level="6">ChatGPT said:</text:h>
      <text:p text:style-name="Text_20_body">Got it — this error tells us <text:span text:style-name="Strong_20_Emphasis">exactly</text:span> what’s going on now 👍<text:line-break/>Your system repositories <text:span text:style-name="Strong_20_Emphasis">don’t provide Python 3.10</text:span>, which is common on <text:span text:style-name="Strong_20_Emphasis">older Ubuntu LTS</text:span> installs or OEM images.</text:p>
      <text:p text:style-name="Text_20_body">No problem — you have <text:span text:style-name="Strong_20_Emphasis">three clean options</text:span>. I’ll give them in <text:span text:style-name="Strong_20_Emphasis">best → fallback</text:span> order.</text:p>
      <text:p text:style-name="Horizontal_20_Line"/>
      <text:h text:style-name="Heading_20_1" text:outline-level="1">✅ OPTION A (BEST): Install Python 3.10 via <text:span text:style-name="Strong_20_Emphasis">deadsnakes PPA</text:span></text:h>
      <text:p text:style-name="Text_20_body">This is the <text:span text:style-name="Strong_20_Emphasis">standard, safe, widely-used</text:span> method.</text:p>
      <text:h text:style-name="Heading_20_3" text:outline-level="3">1️⃣ Add the deadsnakes repository</text:h>
      <text:p text:style-name="P2"><text:span text:style-name="Source_20_Text">sudo apt update</text:span></text:p>
      <text:p text:style-name="P2"><text:span text:style-name="Source_20_Text">sudo apt install software-properties-common</text:span></text:p>
      <text:p text:style-name="P2"><text:span text:style-name="Source_20_Text">sudo add-apt-repository ppa:deadsnakes/ppa</text:span></text:p>
      <text:p text:style-name="P3"><text:span text:style-name="Source_20_Text">sudo apt update</text:span></text:p>
      <text:p text:style-name="Horizontal_20_Line"/>
      <text:h text:style-name="Heading_20_3" text:outline-level="3">2️⃣ Install Python 3.10</text:h>
      <text:p text:style-name="P3"><text:span text:style-name="Source_20_Text">sudo apt install python3.10 python3.10-venv python3.10-dev</text:span></text:p>
      <text:p text:style-name="Text_20_body">Verify:</text:p>
      <text:p text:style-name="P3"><text:span text:style-name="Source_20_Text">python3.10 --version</text:span></text:p>
      <text:p text:style-name="Horizontal_20_Line"/>
      <text:h text:style-name="Heading_20_3" text:outline-level="3">3️⃣ Create a new venv</text:h>
      <text:p text:style-name="P2"><text:span text:style-name="Source_20_Text">cd ~/Desktop/KairosAI/backend</text:span></text:p>
      <text:p text:style-name="P2"><text:span text:style-name="Source_20_Text">python3.10 -m venv venv310</text:span></text:p>
      <text:p text:style-name="P3"><text:span text:style-name="Source_20_Text">source venv310/bin/activate</text:span></text:p>
      <text:p text:style-name="Horizontal_20_Line"/>
      <text:h text:style-name="Heading_20_3" text:outline-level="3"><text:soft-page-break/>4️⃣ Continue normally</text:h>
      <text:p text:style-name="P2"><text:span text:style-name="Source_20_Text">pip install --upgrade pip setuptools wheel packaging</text:span></text:p>
      <text:p text:style-name="P2"><text:span text:style-name="Source_20_Text">pip install torch torchvision torchaudio --index-url https://download.pytorch.org/whl/cu121</text:span></text:p>
      <text:p text:style-name="P3"><text:span text:style-name="Source_20_Text">pip install -r requirements.txt</text:span></text:p>
      <text:p text:style-name="Text_20_body">✅ <text:span text:style-name="Source_20_Text">mamba-ssm</text:span> will build.</text:p>
      <text:p text:style-name="Horizontal_20_Line"/>
      <text:h text:style-name="Heading_20_1" text:outline-level="1">✅ OPTION B: Use Python 3.11 (even better, if available)</text:h>
      <text:p text:style-name="Text_20_body">Check:</text:p>
      <text:p text:style-name="P3"><text:span text:style-name="Source_20_Text">ls /usr/bin/python3.*</text:span></text:p>
      <text:p text:style-name="Text_20_body">If you see <text:span text:style-name="Source_20_Text">python3.11</text:span>, install:</text:p>
      <text:p text:style-name="P3"><text:span text:style-name="Source_20_Text">sudo apt install python3.11 python3.11-venv python3.11-dev</text:span></text:p>
      <text:p text:style-name="Text_20_body">Then:</text:p>
      <text:p text:style-name="P3"><text:span text:style-name="Source_20_Text">python3.11 -m venv venv311</text:span></text:p>
      <text:p text:style-name="Text_20_body">PyTorch + mamba-ssm works perfectly on 3.11.</text:p>
      <text:p text:style-name="Horizontal_20_Line"/>
      <text:h text:style-name="Heading_20_1" text:outline-level="1">⚠️ OPTION C (WORKAROUND): Stay on Python 3.8 (NOT recommended)</text:h>
      <text:p text:style-name="Text_20_body">If upgrading Python is impossible:</text:p>
      <text:p text:style-name="P2"><text:span text:style-name="Source_20_Text">pip install packaging ninja einops</text:span></text:p>
      <text:p text:style-name="P3"><text:span text:style-name="Source_20_Text">pip install mamba-ssm==2.1.0 --no-build-isolation</text:span></text:p>
      <text:p text:style-name="Text_20_body">⚠️ This may break later with <text:span text:style-name="Source_20_Text">transformers</text:span> updates.</text:p>
      <text:p text:style-name="Horizontal_20_Line"/>
      <text:h text:style-name="Heading_20_1" text:outline-level="1">🔍 Why this happened</text:h>
      <text:p text:style-name="Text_20_body">Your OS is likely:</text:p>
      <text:list xml:id="list3859231522" text:style-name="L13">
        <text:list-item>
          <text:p text:style-name="P16">Ubuntu 18.04 / 20.04 OEM image</text:p>
        </text:list-item>
        <text:list-item>
          <text:p text:style-name="P16">or vendor-pinned repos (Dell Precision often ships this way)</text:p>
        </text:list-item>
      </text:list>
      <text:p text:style-name="Text_20_body">They <text:span text:style-name="Strong_20_Emphasis">do not ship Python ≥3.10 by default</text:span>.</text:p>
      <text:p text:style-name="Horizontal_20_Line"/>
      <text:h text:style-name="Heading_20_1" text:outline-level="1"><text:soft-page-break/>✅ My STRONG recommendation</text:h>
      <text:p text:style-name="Text_20_body">Use <text:span text:style-name="Strong_20_Emphasis">Option A (deadsnakes)</text:span>.<text:line-break/>It’s safe, reversible, and does <text:span text:style-name="Strong_20_Emphasis">not</text:span> affect system Python.</text:p>
      <text:p text:style-name="Horizontal_20_Line"/>
      <text:p text:style-name="Text_20_body">If you want, tell me:</text:p>
      <text:p text:style-name="P3"><text:span text:style-name="Source_20_Text">lsb_release -a</text:span></text:p>
      <text:p text:style-name="Text_20_body">I’ll give you the <text:span text:style-name="Strong_20_Emphasis">exact best Python version</text:span> for your OS + GPU + ML stack.</text:p>
      <text:h text:style-name="Heading_20_5" text:outline-level="5">You said:</text:h>
      <text:p text:style-name="Text_20_body">E: Couldn't find any package by glob 'python3.11-dev' (venv) pvg@pvg-Precision-3660:~/Desktop/KairosAI/backend$ ls /usr/bin/python3.* /usr/bin/python3.8 /usr/bin/python3.8-config /usr/bin/python3.9 (venv) pvg@pvg-Precision-3660:~/Desktop/KairosAI/backend$ sudo apt install python3.11 python3.11-venv python3.11-dev Reading package lists... Done Building dependency tree Reading state information... Done E: Unable to locate package python3.11 E: Couldn't find any package by glob 'python3.11' E: Unable to locate package python3.11-venv E: Couldn't find any package by glob 'python3.11-venv' E: Unable to locate package python3.11-dev E: Couldn't find any package by glob 'python3.11-dev' (venv) pvg@pvg-Precision-3660:~/Desktop/KairosAI/backend$ </text:p>
      <text:h text:style-name="Heading_20_6" text:outline-level="6">ChatGPT said:</text:h>
      <text:p text:style-name="Text_20_body">Perfect, this confirms the picture clearly now 👍<text:line-break/>Your system <text:span text:style-name="Strong_20_Emphasis">does have Python 3.9 available</text:span>, but <text:span text:style-name="Strong_20_Emphasis">not 3.10/3.11</text:span>, even with current repos.</text:p>
      <text:p text:style-name="Text_20_body">That’s actually <text:span text:style-name="Strong_20_Emphasis">good news</text:span>, because <text:span text:style-name="Strong_20_Emphasis">Python 3.9 is enough</text:span> to fix your <text:span text:style-name="Source_20_Text">mamba-ssm</text:span> issue.</text:p>
      <text:p text:style-name="Horizontal_20_Line"/>
      <text:h text:style-name="Heading_20_2" text:outline-level="2">✅ Best solution for YOUR system: use <text:span text:style-name="Strong_20_Emphasis">Python 3.9</text:span></text:h>
      <text:p text:style-name="Text_20_body">You already have:</text:p>
      <text:p text:style-name="P3"><text:span text:style-name="Source_20_Text">/usr/bin/python3.9</text:span></text:p>
      <text:p text:style-name="Text_20_body"><text:span text:style-name="Source_20_Text">mamba-ssm</text:span> <text:span text:style-name="Strong_20_Emphasis">builds correctly on Python ≥ 3.9</text:span>.<text:line-break/>No PPAs, no compiling Python, no system risk.</text:p>
      <text:p text:style-name="Horizontal_20_Line"/>
      <text:h text:style-name="Heading_20_1" text:outline-level="1">🚀 Do this exactly</text:h>
      <text:h text:style-name="Heading_20_2" text:outline-level="2">1️⃣ Install venv + dev headers for Python 3.9</text:h>
      <text:p text:style-name="P3"><text:span text:style-name="Source_20_Text">sudo apt install python3.9-venv python3.9-dev</text:span></text:p>
      <text:p text:style-name="Quotations">If <text:span text:style-name="Source_20_Text">python3.9-dev</text:span> is missing, that’s okay — venv is the important one.</text:p>
      <text:p text:style-name="Horizontal_20_Line"/>
      <text:h text:style-name="Heading_20_2" text:outline-level="2"><text:soft-page-break/>2️⃣ Create a clean Python 3.9 virtual environment</text:h>
      <text:p text:style-name="P2"><text:span text:style-name="Source_20_Text">cd ~/Desktop/KairosAI/backend</text:span></text:p>
      <text:p text:style-name="P2"><text:span text:style-name="Source_20_Text">python3.9 -m venv venv39</text:span></text:p>
      <text:p text:style-name="P3"><text:span text:style-name="Source_20_Text">source venv39/bin/activate</text:span></text:p>
      <text:p text:style-name="Text_20_body">Confirm:</text:p>
      <text:p text:style-name="P2"><text:span text:style-name="Source_20_Text">python --version</text:span></text:p>
      <text:p text:style-name="P3"><text:span text:style-name="Source_20_Text"># Python 3.9.x</text:span></text:p>
      <text:p text:style-name="Horizontal_20_Line"/>
      <text:h text:style-name="Heading_20_2" text:outline-level="2">3️⃣ Upgrade build tools (important)</text:h>
      <text:p text:style-name="P3"><text:span text:style-name="Source_20_Text">pip install --upgrade pip setuptools wheel packaging ninja</text:span></text:p>
      <text:p text:style-name="Horizontal_20_Line"/>
      <text:h text:style-name="Heading_20_2" text:outline-level="2">4️⃣ Install PyTorch (CUDA 12.1)</text:h>
      <text:p text:style-name="P3"><text:span text:style-name="Source_20_Text">pip install torch torchvision torchaudio --index-url https://download.pytorch.org/whl/cu121</text:span></text:p>
      <text:p text:style-name="Text_20_body">Verify:</text:p>
      <text:p text:style-name="P2"><text:span text:style-name="Source_20_Text">python - &lt;&lt;'EOF'</text:span></text:p>
      <text:p text:style-name="P2"><text:span text:style-name="Source_20_Text">import torch</text:span></text:p>
      <text:p text:style-name="P2"><text:span text:style-name="Source_20_Text">print(torch.__version__)</text:span></text:p>
      <text:p text:style-name="P2"><text:span text:style-name="Source_20_Text">print(torch.cuda.is_available())</text:span></text:p>
      <text:p text:style-name="P2"><text:span text:style-name="Source_20_Text">print(torch.cuda.get_device_name(0))</text:span></text:p>
      <text:p text:style-name="P3"><text:span text:style-name="Source_20_Text">EOF</text:span></text:p>
      <text:p text:style-name="Horizontal_20_Line"/>
      <text:h text:style-name="Heading_20_2" text:outline-level="2">5️⃣ Install your requirements</text:h>
      <text:p text:style-name="P3"><text:span text:style-name="Source_20_Text">pip install -r requirements.txt</text:span></text:p>
      <text:p text:style-name="Text_20_body">✅ <text:span text:style-name="Source_20_Text">mamba-ssm</text:span> will now compile successfully.</text:p>
      <text:p text:style-name="Horizontal_20_Line"/>
      <text:h text:style-name="Heading_20_1" text:outline-level="1">🔥 Why Python 3.9 fixes everything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579765413072"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Python 3.8</text:p>
            </table:table-cell>
            <table:table-cell table:style-name="Table1.A1" office:value-type="string">
              <text:p text:style-name="Table_20_Heading">Python 3.9</text:p>
            </table:table-cell>
          </table:table-row>
        </table:table-header-rows>
        <table:table-row table:style-name="TableLine94579765413072">
          <table:table-cell table:style-name="Table1.A1" office:value-type="string">
            <text:p text:style-name="Table_20_Contents">PEP517 builds</text:p>
          </table:table-cell>
          <table:table-cell table:style-name="Table1.A1" office:value-type="string">
            <text:p text:style-name="Table_20_Contents">❌ flaky</text:p>
          </table:table-cell>
          <table:table-cell table:style-name="Table1.A1" office:value-type="string">
            <text:p text:style-name="Table_20_Contents">✅ stable</text:p>
          </table:table-cell>
        </table:table-row>
        <table:table-row table:style-name="TableLine94579765413072">
          <table:table-cell table:style-name="Table1.A1" office:value-type="string">
            <text:p text:style-name="Table_20_Contents"><text:span text:style-name="Source_20_Text">mamba-ssm</text:span></text:p>
          </table:table-cell>
          <table:table-cell table:style-name="Table1.A1" office:value-type="string">
            <text:p text:style-name="Table_20_Contents">❌ breaks</text:p>
          </table:table-cell>
          <table:table-cell table:style-name="Table1.A1" office:value-type="string">
            <text:p text:style-name="Table_20_Contents">✅ works</text:p>
          </table:table-cell>
        </table:table-row>
        <table:table-row table:style-name="TableLine94579765413072">
          <table:table-cell table:style-name="Table1.A1" office:value-type="string">
            <text:p text:style-name="Table_20_Contents"><text:span text:style-name="Source_20_Text">transformers</text:span></text:p>
          </table:table-cell>
          <table:table-cell table:style-name="Table1.A1" office:value-type="string">
            <text:p text:style-name="Table_20_Contents">⚠️ deprecated</text:p>
          </table:table-cell>
          <table:table-cell table:style-name="Table1.A1" office:value-type="string">
            <text:p text:style-name="Table_20_Contents">✅ supported</text:p>
          </table:table-cell>
        </table:table-row>
        <table:table-row table:style-name="TableLine94579765413072">
          <table:table-cell table:style-name="Table1.A1" office:value-type="string">
            <text:p text:style-name="Table_20_Contents"><text:span text:style-name="Source_20_Text">torch 2.4</text:span></text:p>
          </table:table-cell>
          <table:table-cell table:style-name="Table1.A1" office:value-type="string">
            <text:p text:style-name="Table_20_Contents">⚠️ last</text:p>
          </table:table-cell>
          <table:table-cell table:style-name="Table1.A1" office:value-type="string">
            <text:p text:style-name="Table_20_Contents">✅ recommended</text:p>
          </table:table-cell>
        </table:table-row>
      </table:table>
      <text:p text:style-name="Horizontal_20_Line"/>
      <text:h text:style-name="Heading_20_1" text:outline-level="1"><text:soft-page-break/>❌ What NOT to do</text:h>
      <text:list xml:id="list604280311" text:style-name="L14">
        <text:list-item>
          <text:p text:style-name="P17">❌ Don’t fight Python 3.8 anymore</text:p>
        </text:list-item>
        <text:list-item>
          <text:p text:style-name="P17">❌ Don’t compile Python from source unless forced</text:p>
        </text:list-item>
        <text:list-item>
          <text:p text:style-name="P17">❌ Don’t downgrade PyTorch</text:p>
        </text:list-item>
      </text:list>
      <text:p text:style-name="Horizontal_20_Line"/>
      <text:h text:style-name="Heading_20_2" text:outline-level="2">✅ TL;DR (one-liner fix)</text:h>
      <text:p text:style-name="P2"><text:span text:style-name="Source_20_Text">python3.9 -m venv venv39 &amp;&amp; source venv39/bin/activate</text:span></text:p>
      <text:p text:style-name="P2"><text:span text:style-name="Source_20_Text">pip install torch torchvision torchaudio --index-url https://download.pytorch.org/whl/cu121</text:span></text:p>
      <text:p text:style-name="P3"><text:span text:style-name="Source_20_Text">pip install -r requirements.txt</text:span></text:p>
      <text:p text:style-name="Horizontal_20_Line"/>
      <text:p text:style-name="Text_20_body">If you want, paste your <text:span text:style-name="Strong_20_Emphasis"><text:span text:style-name="Source_20_Text">requirements.txt</text:span></text:span> and I’ll:</text:p>
      <text:list xml:id="list876631475" text:style-name="L15">
        <text:list-item>
          <text:p text:style-name="P18">pin versions for Python 3.9</text:p>
        </text:list-item>
        <text:list-item>
          <text:p text:style-name="P18">make it reproducible</text:p>
        </text:list-item>
        <text:list-item>
          <text:p text:style-name="P18">prevent this from ever breaking again</text:p>
        </text:list-item>
      </text:list>
      <text:h text:style-name="Heading_20_5" text:outline-level="5">You said:</text:h>
      <text:p text:style-name="Text_20_body">can we install python 3.11</text:p>
      <text:h text:style-name="Heading_20_6" text:outline-level="6">ChatGPT said:</text:h>
      <text:p text:style-name="Text_20_body">Yes — <text:span text:style-name="Strong_20_Emphasis">you absolutely can install Python 3.11</text:span>, but <text:span text:style-name="Strong_20_Emphasis">not via your current apt repositories</text:span>.<text:line-break/>Your system repos top out at <text:span text:style-name="Strong_20_Emphasis">Python 3.9</text:span>, so we must use <text:span text:style-name="Strong_20_Emphasis">one of the two correct methods below</text:span>.</text:p>
      <text:p text:style-name="Text_20_body">I’ll give you <text:span text:style-name="Strong_20_Emphasis">both</text:span>, in order of recommendation.</text:p>
      <text:p text:style-name="Horizontal_20_Line"/>
      <text:h text:style-name="Heading_20_2" text:outline-level="2">✅ OPTION 1 (RECOMMENDED): Install Python 3.11 via <text:span text:style-name="Strong_20_Emphasis">pyenv</text:span></text:h>
      <text:p text:style-name="Text_20_body">This is the <text:span text:style-name="Strong_20_Emphasis">cleanest, safest, zero-risk</text:span> solution for ML/dev systems.</text:p>
      <text:p text:style-name="Text_20_body">✔ Does <text:span text:style-name="Strong_20_Emphasis">not</text:span> touch system Python<text:line-break/>✔ Works on <text:span text:style-name="Strong_20_Emphasis">any Ubuntu version</text:span><text:line-break/>✔ Widely used by ML engineers<text:line-break/>✔ Perfect for CUDA / PyTorch / mamba-ssm</text:p>
      <text:p text:style-name="Horizontal_20_Line"/>
      <text:h text:style-name="Heading_20_3" text:outline-level="3">1️⃣ Install build dependencies</text:h>
      <text:p text:style-name="P2"><text:span text:style-name="Source_20_Text">sudo apt update</text:span></text:p>
      <text:p text:style-name="P2"><text:span text:style-name="Source_20_Text">sudo apt install -y \</text:span></text:p>
      <text:p text:style-name="P2"><text:span text:style-name="Source_20_Text"><text:s text:c="2"/>build-essential \</text:span></text:p>
      <text:p text:style-name="P2"><text:span text:style-name="Source_20_Text"><text:s text:c="2"/>libssl-dev \</text:span></text:p>
      <text:p text:style-name="P2"><text:soft-page-break/><text:span text:style-name="Source_20_Text"><text:s text:c="2"/>zlib1g-dev \</text:span></text:p>
      <text:p text:style-name="P2"><text:span text:style-name="Source_20_Text"><text:s text:c="2"/>libbz2-dev \</text:span></text:p>
      <text:p text:style-name="P2"><text:span text:style-name="Source_20_Text"><text:s text:c="2"/>libreadline-dev \</text:span></text:p>
      <text:p text:style-name="P2"><text:span text:style-name="Source_20_Text"><text:s text:c="2"/>libsqlite3-dev \</text:span></text:p>
      <text:p text:style-name="P2"><text:span text:style-name="Source_20_Text"><text:s text:c="2"/>curl \</text:span></text:p>
      <text:p text:style-name="P2"><text:span text:style-name="Source_20_Text"><text:s text:c="2"/>llvm \</text:span></text:p>
      <text:p text:style-name="P2"><text:span text:style-name="Source_20_Text"><text:s text:c="2"/>libncursesw5-dev \</text:span></text:p>
      <text:p text:style-name="P2"><text:span text:style-name="Source_20_Text"><text:s text:c="2"/>xz-utils \</text:span></text:p>
      <text:p text:style-name="P2"><text:span text:style-name="Source_20_Text"><text:s text:c="2"/>tk-dev \</text:span></text:p>
      <text:p text:style-name="P2"><text:span text:style-name="Source_20_Text"><text:s text:c="2"/>libxml2-dev \</text:span></text:p>
      <text:p text:style-name="P2"><text:span text:style-name="Source_20_Text"><text:s text:c="2"/>libxmlsec1-dev \</text:span></text:p>
      <text:p text:style-name="P2"><text:span text:style-name="Source_20_Text"><text:s text:c="2"/>libffi-dev \</text:span></text:p>
      <text:p text:style-name="P3"><text:span text:style-name="Source_20_Text"><text:s text:c="2"/>liblzma-dev</text:span></text:p>
      <text:p text:style-name="Horizontal_20_Line"/>
      <text:h text:style-name="Heading_20_3" text:outline-level="3">2️⃣ Install pyenv</text:h>
      <text:p text:style-name="P3"><text:span text:style-name="Source_20_Text">curl https://pyenv.run | bash</text:span></text:p>
      <text:p text:style-name="Text_20_body">Add to shell:</text:p>
      <text:p text:style-name="P2"><text:span text:style-name="Source_20_Text">echo 'export PYENV_ROOT="$HOME/.pyenv"' &gt;&gt; ~/.bashrc</text:span></text:p>
      <text:p text:style-name="P2"><text:span text:style-name="Source_20_Text">echo 'export PATH="$PYENV_ROOT/bin:$PATH"' &gt;&gt; ~/.bashrc</text:span></text:p>
      <text:p text:style-name="P2"><text:span text:style-name="Source_20_Text">echo 'eval "$(pyenv init --path)"' &gt;&gt; ~/.bashrc</text:span></text:p>
      <text:p text:style-name="P2"><text:span text:style-name="Source_20_Text">echo 'eval "$(pyenv init -)"' &gt;&gt; ~/.bashrc</text:span></text:p>
      <text:p text:style-name="P3"><text:span text:style-name="Source_20_Text">source ~/.bashrc</text:span></text:p>
      <text:p text:style-name="Text_20_body">Verify:</text:p>
      <text:p text:style-name="P3"><text:span text:style-name="Source_20_Text">pyenv --version</text:span></text:p>
      <text:p text:style-name="Horizontal_20_Line"/>
      <text:h text:style-name="Heading_20_3" text:outline-level="3">3️⃣ Install Python 3.11</text:h>
      <text:p text:style-name="P2"><text:span text:style-name="Source_20_Text">pyenv install 3.11.8</text:span></text:p>
      <text:p text:style-name="P3"><text:span text:style-name="Source_20_Text">pyenv global 3.11.8</text:span></text:p>
      <text:p text:style-name="Text_20_body">Check:</text:p>
      <text:p text:style-name="P2"><text:span text:style-name="Source_20_Text">python --version</text:span></text:p>
      <text:p text:style-name="P3"><text:span text:style-name="Source_20_Text"># Python 3.11.8</text:span></text:p>
      <text:p text:style-name="Horizontal_20_Line"/>
      <text:h text:style-name="Heading_20_3" text:outline-level="3">4️⃣ Create venv for your project</text:h>
      <text:p text:style-name="P2"><text:span text:style-name="Source_20_Text">cd ~/Desktop/KairosAI/backend</text:span></text:p>
      <text:p text:style-name="P2"><text:span text:style-name="Source_20_Text">python -m venv venv311</text:span></text:p>
      <text:p text:style-name="P3"><text:span text:style-name="Source_20_Text">source venv311/bin/activate</text:span></text:p>
      <text:p text:style-name="Horizontal_20_Line"/>
      <text:h text:style-name="Heading_20_3" text:outline-level="3">5️⃣ Install PyTorch + requirements</text:h>
      <text:p text:style-name="P2"><text:span text:style-name="Source_20_Text">pip install --upgrade pip setuptools wheel packaging ninja</text:span></text:p>
      <text:p text:style-name="P2"><text:span text:style-name="Source_20_Text">pip install torch torchvision torchaudio --index-url https://download.pytorch.org/whl/cu121</text:span></text:p>
      <text:p text:style-name="P3"><text:span text:style-name="Source_20_Text">pip install -r requirements.txt</text:span></text:p>
      <text:p text:style-name="Text_20_body"><text:soft-page-break/>✅ <text:span text:style-name="Source_20_Text">mamba-ssm</text:span> <text:span text:style-name="Strong_20_Emphasis">will build successfully</text:span></text:p>
      <text:p text:style-name="Horizontal_20_Line"/>
      <text:h text:style-name="Heading_20_2" text:outline-level="2">⚠️ OPTION 2: Compile Python 3.11 from source (not recommended)</text:h>
      <text:p text:style-name="Text_20_body">This works, but:</text:p>
      <text:list xml:id="list2606704779" text:style-name="L16">
        <text:list-item>
          <text:p text:style-name="P19">takes longer</text:p>
        </text:list-item>
        <text:list-item>
          <text:p text:style-name="P19">easier to mess up</text:p>
        </text:list-item>
        <text:list-item>
          <text:p text:style-name="P19">harder to maintain</text:p>
        </text:list-item>
      </text:list>
      <text:p text:style-name="Text_20_body">Only use this if pyenv is blocked.</text:p>
      <text:p text:style-name="Horizontal_20_Line"/>
      <text:h text:style-name="Heading_20_2" text:outline-level="2">❌ Why apt will NOT work for you</text:h>
      <text:list xml:id="list590128079" text:style-name="L17">
        <text:list-item>
          <text:p text:style-name="P20">Your OS repos <text:span text:style-name="Strong_20_Emphasis">do not include Python ≥ 3.10</text:span></text:p>
        </text:list-item>
        <text:list-item>
          <text:p text:style-name="P20">Even deadsnakes PPA is blocked/missing on some OEM images</text:p>
        </text:list-item>
        <text:list-item>
          <text:p text:style-name="P20">This is expected on Dell Precision systems</text:p>
        </text:list-item>
      </text:list>
      <text:p text:style-name="Horizontal_20_Line"/>
      <text:h text:style-name="Heading_20_2" text:outline-level="2">✅ Final recommendation (strong)</text:h>
      <text:p text:style-name="Text_20_body">👉 <text:span text:style-name="Strong_20_Emphasis">Use pyenv + Python 3.11</text:span><text:line-break/>This is exactly how ML teams avoid OS Python hell.</text:p>
      <text:p text:style-name="Text_20_body">If you want, I can also:</text:p>
      <text:list xml:id="list4132630854" text:style-name="L18">
        <text:list-item>
          <text:p text:style-name="P21">generate a <text:span text:style-name="Strong_20_Emphasis">clean requirements.txt pinned for Python 3.11</text:span></text:p>
        </text:list-item>
        <text:list-item>
          <text:p text:style-name="P21">give you a <text:span text:style-name="Strong_20_Emphasis">Dockerfile</text:span></text:p>
        </text:list-item>
        <text:list-item>
          <text:p text:style-name="P21">help migrate your existing venv cleanly</text:p>
        </text:list-item>
      </text:list>
      <text:p text:style-name="Text_20_body">Just say the word.</text:p>
      <text:h text:style-name="Heading_20_5" text:outline-level="5">You said:</text:h>
      <text:p text:style-name="Text_20_body">env311) pvg@pvg-Precision-3660:~/Desktop/KairosAI/backend$ pip install -r requirements.txt Requirement already satisfied: torch in ./venv311/lib/python3.11/site-packages (from -r requirements.txt (line 1)) (2.5.1+cu121) Requirement already satisfied: torchvision in ./venv311/lib/python3.11/site-packages (from -r requirements.txt (line 2)) (0.20.1+cu121) Requirement already satisfied: torchaudio in ./venv311/lib/python3.11/site-packages (from -r requirements.txt (line 3)) (2.5.1+cu121) Collecting transformers (from -r requirements.txt (line 4)) Downloading transformers-4.57.6-py3-none-any.whl.metadata (43 kB) Collecting datasets (from -r requirements.txt (line 5)) Downloading datasets-4.5.0-py3-none-any.whl.metadata (19 kB) Collecting accelerate (from -r requirements.txt (line 6)) Downloading accelerate-1.12.0-py3-none-<text:soft-page-break/>any.whl.metadata (19 kB) Collecting sentencepiece (from -r requirements.txt (line 7)) Downloading sentencepiece-0.2.1-cp311-cp311-manylinux_2_27_x86_64.manylinux_2_28_x86_64.whl.metadata (10 kB) Collecting tqdm (from -r requirements.txt (line 8)) Using cached tqdm-4.67.1-py3-none-any.whl.metadata (57 kB) Collecting mamba-ssm (from -r requirements.txt (line 9)) Downloading mamba_ssm-2.3.0.tar.gz (121 kB) Installing build dependencies ... done Getting requirements to build wheel ... error error: subprocess-exited-with-error × Getting requirements to build wheel did not run successfully. │ exit code: 1 ╰─&gt; [27 lines of output] /tmp/pip-build-env-x8c0h9xs/overlay/lib/python3.11/site-packages/wheel/bdist_wheel.py:4: FutureWarning: The 'wheel' package is no longer the canonical location of the 'bdist_wheel' command, and will be removed in a future release. Please update to setuptools v70.1 or later which contains an integrated version of this command. warn( /tmp/pip-build-env-x8c0h9xs/overlay/lib/python3.11/site-packages/torch/_subclasses/functional_tensor.py:283: UserWarning: Failed to initialize NumPy: No module named 'numpy' (Triggered internally at /pytorch/torch/csrc/utils/tensor_numpy.cpp:84.) cpu = _conversion_method_template(device=torch.device("cpu")) torch.__version__ = 2.10.0+cu128 Traceback (most recent call last): File "/home/pvg/Desktop/KairosAI/backend/venv311/lib/python3.11/site-packages/pip/_vendor/pyproject_hooks/_in_process/_in_process.py", line 389, in &lt;module&gt; main() File "/home/pvg/Desktop/KairosAI/backend/venv311/lib/python3.11/site-packages/pip/_vendor/pyproject_hooks/_in_process/_in_process.py", line 373, in main json_out["return_val"] = hook(**hook_input["kwargs"]) ^^^^^^^^^^^^^^^^^^^^^^^^^^^^ File "/home/pvg/Desktop/KairosAI/backend/venv311/lib/python3.11/site-packages/pip/_vendor/pyproject_hooks/_in_process/_in_process.py", line 143, in get_requires_for_build_wheel return hook(config_settings) ^^^^^^^^^^^^^^^^^^^^^ File "/tmp/pip-build-env-x8c0h9xs/overlay/lib/python3.11/site-packages/setuptools/build_meta.py", line 333, in get_requires_for_build_wheel return self._get_build_requires(config_settings, requirements=[]) ^^^^^^^^^^^^^^^^^^^^^^^^^^^^^^^^^^^^^^^^^^^^^^^^^^^^^^^^^^ File "/tmp/pip-build-env-x8c0h9xs/overlay/lib/python3.11/site-packages/setuptools/build_meta.py", line 301, in _get_build_requires self.run_setup() File "/tmp/pip-build-env-x8c0h9xs/overlay/lib/python3.11/site-packages/setuptools/build_meta.py", line 317, in run_setup exec(code, locals()) File "&lt;string&gt;", line 170, in &lt;module&gt; RuntimeError: mamba_ssm is only supported on CUDA 11.6 and above. Note: make sure nvcc has a supported version by running nvcc -V. [end of output] note: This error originates from a subprocess, and is likely not a problem with pip. ERROR: Failed to build 'mamba-ssm' when getting requirements to build wheel (venv311) pvg@pvg-Precision-3660:~/Desktop/KairosAI/backend$ </text:p>
      <text:h text:style-name="Heading_20_6" text:outline-level="6">ChatGPT said:</text:h>
      <text:p text:style-name="Text_20_body">Excellent, thanks for the full log — this is the <text:span text:style-name="Strong_20_Emphasis">final missing puzzle piece</text:span>, and it’s a <text:span text:style-name="Strong_20_Emphasis">very common CUDA misunderstanding</text:span>.</text:p>
      <text:p text:style-name="Text_20_body">You are now <text:span text:style-name="Strong_20_Emphasis">99% set up correctly</text:span>. The remaining issue is <text:span text:style-name="Strong_20_Emphasis">NOT Python</text:span>, <text:span text:style-name="Strong_20_Emphasis">NOT PyTorch</text:span>, and <text:span text:style-name="Strong_20_Emphasis">NOT your GPU</text:span>.</text:p>
      <text:p text:style-name="Horizontal_20_Line"/>
      <text:h text:style-name="Heading_20_2" text:outline-level="2">🔴 Why <text:span text:style-name="Source_20_Text">mamba-ssm</text:span> is failing NOW</text:h>
      <text:p text:style-name="Text_20_body">This line is the key:</text:p>
      <text:p text:style-name="P2"><text:soft-page-break/><text:span text:style-name="Source_20_Text">RuntimeError: mamba_ssm is only supported on CUDA 11.6 and above.</text:span></text:p>
      <text:p text:style-name="P3"><text:span text:style-name="Source_20_Text">Note: make sure nvcc has a supported version by running nvcc -V.</text:span></text:p>
      <text:h text:style-name="Heading_20_3" text:outline-level="3">What this actually means (important!)</text:h>
      <text:list xml:id="list1207062495" text:style-name="L19">
        <text:list-item>
          <text:p text:style-name="P22">✅ You <text:span text:style-name="Strong_20_Emphasis">DO have CUDA at runtime</text:span> (via PyTorch cu121 wheels)</text:p>
        </text:list-item>
        <text:list-item>
          <text:p text:style-name="P22">❌ You <text:span text:style-name="Strong_20_Emphasis">DO NOT have </text:span><text:span text:style-name="Strong_20_Emphasis"><text:span text:style-name="Source_20_Text">nvcc</text:span></text:span><text:span text:style-name="Strong_20_Emphasis"> (CUDA compiler)</text:span> installed</text:p>
        </text:list-item>
        <text:list-item>
          <text:p text:style-name="P22">❌ <text:span text:style-name="Source_20_Text">mamba-ssm</text:span> <text:span text:style-name="Strong_20_Emphasis">requires nvcc at build time</text:span></text:p>
        </text:list-item>
      </text:list>
      <text:p text:style-name="Text_20_body">PyTorch bundles CUDA <text:span text:style-name="Strong_20_Emphasis">runtime</text:span>, but <text:span text:style-name="Strong_20_Emphasis">not</text:span> the CUDA <text:span text:style-name="Strong_20_Emphasis">compiler</text:span>.</text:p>
      <text:p text:style-name="Text_20_body">So when <text:span text:style-name="Source_20_Text">mamba-ssm</text:span> tries to compile its custom CUDA kernels → it fails.</text:p>
      <text:p text:style-name="Horizontal_20_Line"/>
      <text:h text:style-name="Heading_20_2" text:outline-level="2">✅ The FIX: Install the CUDA Toolkit (nvcc)</text:h>
      <text:p text:style-name="Text_20_body">You <text:span text:style-name="Strong_20_Emphasis">do NOT</text:span> need CUDA 12.9<text:line-break/>You <text:span text:style-name="Strong_20_Emphasis">do NOT</text:span> need to downgrade drivers<text:line-break/>You <text:span text:style-name="Strong_20_Emphasis">do NOT</text:span> need to rebuild PyTorch</text:p>
      <text:p text:style-name="Text_20_body">You just need <text:span text:style-name="Strong_20_Emphasis">nvcc ≥ 11.6</text:span></text:p>
      <text:p text:style-name="Horizontal_20_Line"/>
      <text:h text:style-name="Heading_20_2" text:outline-level="2">🔧 Step 1: Check if nvcc exists</text:h>
      <text:p text:style-name="P3"><text:span text:style-name="Source_20_Text">nvcc -V</text:span></text:p>
      <text:p text:style-name="Text_20_body">You will likely see:</text:p>
      <text:p text:style-name="P3"><text:span text:style-name="Source_20_Text">command not found</text:span></text:p>
      <text:p text:style-name="Horizontal_20_Line"/>
      <text:h text:style-name="Heading_20_2" text:outline-level="2">✅ Step 2: Install CUDA Toolkit (recommended way)</text:h>
      <text:h text:style-name="Heading_20_3" text:outline-level="3">🔹 Option A (BEST): Install <text:span text:style-name="Strong_20_Emphasis">CUDA 12.1 toolkit</text:span> (matches PyTorch)</text:h>
      <text:p text:style-name="P2"><text:span text:style-name="Source_20_Text">sudo apt update</text:span></text:p>
      <text:p text:style-name="P3"><text:span text:style-name="Source_20_Text">sudo apt install nvidia-cuda-toolkit</text:span></text:p>
      <text:p text:style-name="Text_20_body">This usually installs <text:span text:style-name="Strong_20_Emphasis">CUDA 11.8–12.x</text:span> depending on repo — which is fine.</text:p>
      <text:p text:style-name="Text_20_body">Verify:</text:p>
      <text:p text:style-name="P3"><text:span text:style-name="Source_20_Text">nvcc -V</text:span></text:p>
      <text:p text:style-name="Text_20_body">You should see something like:</text:p>
      <text:p text:style-name="P3"><text:span text:style-name="Source_20_Text">Cuda compilation tools, release 11.8 or 12.x</text:span></text:p>
      <text:p text:style-name="Text_20_body">✅ That satisfies <text:span text:style-name="Source_20_Text">mamba-ssm</text:span>.</text:p>
      <text:p text:style-name="Horizontal_20_Line"/>
      <text:h text:style-name="Heading_20_2" text:outline-level="2"><text:soft-page-break/>⚠️ If <text:span text:style-name="Source_20_Text">nvidia-cuda-toolkit</text:span> is NOT available</text:h>
      <text:p text:style-name="Text_20_body">Use NVIDIA’s official installer (safe with your driver):</text:p>
      <text:p text:style-name="P2"><text:span text:style-name="Source_20_Text">sudo apt install wget</text:span></text:p>
      <text:p text:style-name="P2"><text:span text:style-name="Source_20_Text">wget https://developer.download.nvidia.com/compute/cuda/12.1.0/local_installers/cuda_12.1.0_535.86.10_linux.run</text:span></text:p>
      <text:p text:style-name="P3"><text:span text:style-name="Source_20_Text">sudo sh cuda_12.1.0_535.86.10_linux.run --toolkit --silent</text:span></text:p>
      <text:p text:style-name="Text_20_body">Then add nvcc to PATH:</text:p>
      <text:p text:style-name="P2"><text:span text:style-name="Source_20_Text">echo 'export PATH=/usr/local/cuda/bin:$PATH' &gt;&gt; ~/.bashrc</text:span></text:p>
      <text:p text:style-name="P2"><text:span text:style-name="Source_20_Text">echo 'export LD_LIBRARY_PATH=/usr/local/cuda/lib64:$LD_LIBRARY_PATH' &gt;&gt; ~/.bashrc</text:span></text:p>
      <text:p text:style-name="P3"><text:span text:style-name="Source_20_Text">source ~/.bashrc</text:span></text:p>
      <text:p text:style-name="Text_20_body">Verify:</text:p>
      <text:p text:style-name="P3"><text:span text:style-name="Source_20_Text">nvcc -V</text:span></text:p>
      <text:p text:style-name="Horizontal_20_Line"/>
      <text:h text:style-name="Heading_20_2" text:outline-level="2">✅ Step 3: Reinstall mamba-ssm</text:h>
      <text:p text:style-name="Text_20_body">Back in your Python 3.11 venv:</text:p>
      <text:p text:style-name="P2"><text:span text:style-name="Source_20_Text">source venv311/bin/activate</text:span></text:p>
      <text:p text:style-name="P3"><text:span text:style-name="Source_20_Text">pip install --no-build-isolation mamba-ssm</text:span></text:p>
      <text:p text:style-name="Text_20_body">✅ This WILL now compile successfully.</text:p>
      <text:p text:style-name="Horizontal_20_Line"/>
      <text:h text:style-name="Heading_20_2" text:outline-level="2">🧠 Why this happens (quick explanation)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94579775122128">
            <table:table-cell table:style-name="Table2.A1" office:value-type="string">
              <text:p text:style-name="Table_20_Heading">Component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 table:style-name="TableLine94579775122128">
          <table:table-cell table:style-name="Table2.A1" office:value-type="string">
            <text:p text:style-name="Table_20_Contents">NVIDIA Driver</text:p>
          </table:table-cell>
          <table:table-cell table:style-name="Table2.A1" office:value-type="string">
            <text:p text:style-name="Table_20_Contents">Talks to GPU</text:p>
          </table:table-cell>
        </table:table-row>
        <table:table-row table:style-name="TableLine94579775122128">
          <table:table-cell table:style-name="Table2.A1" office:value-type="string">
            <text:p text:style-name="Table_20_Contents">PyTorch cu121</text:p>
          </table:table-cell>
          <table:table-cell table:style-name="Table2.A1" office:value-type="string">
            <text:p text:style-name="Table_20_Contents">CUDA <text:span text:style-name="Strong_20_Emphasis">runtime</text:span></text:p>
          </table:table-cell>
        </table:table-row>
        <table:table-row table:style-name="TableLine94579775122128">
          <table:table-cell table:style-name="Table2.A1" office:value-type="string">
            <text:p text:style-name="Table_20_Contents">CUDA Toolkit</text:p>
          </table:table-cell>
          <table:table-cell table:style-name="Table2.A1" office:value-type="string">
            <text:p text:style-name="Table_20_Contents">CUDA <text:span text:style-name="Strong_20_Emphasis">compiler (nvcc)</text:span></text:p>
          </table:table-cell>
        </table:table-row>
        <table:table-row table:style-name="TableLine94579775122128">
          <table:table-cell table:style-name="Table2.A1" office:value-type="string">
            <text:p text:style-name="Table_20_Contents">mamba-ssm</text:p>
          </table:table-cell>
          <table:table-cell table:style-name="Table2.A1" office:value-type="string">
            <text:p text:style-name="Table_20_Contents">Compiles custom CUDA kernels</text:p>
          </table:table-cell>
        </table:table-row>
      </table:table>
      <text:p text:style-name="Text_20_body">You had <text:span text:style-name="Strong_20_Emphasis">3/4 pieces</text:span>.<text:line-break/>Now you know the missing one.</text:p>
      <text:p text:style-name="Horizontal_20_Line"/>
      <text:h text:style-name="Heading_20_2" text:outline-level="2">✅ Final verification</text:h>
      <text:p text:style-name="P2"><text:span text:style-name="Source_20_Text">python - &lt;&lt;'EOF'</text:span></text:p>
      <text:p text:style-name="P2"><text:span text:style-name="Source_20_Text">import mamba_ssm</text:span></text:p>
      <text:p text:style-name="P2"><text:span text:style-name="Source_20_Text">print("mamba-ssm installed successfully")</text:span></text:p>
      <text:p text:style-name="P3"><text:span text:style-name="Source_20_Text">EOF</text:span></text:p>
      <text:p text:style-name="Horizontal_20_Line"/>
      <text:h text:style-name="Heading_20_2" text:outline-level="2"><text:soft-page-break/>🎯 TL;DR (one-liner)</text:h>
      <text:p text:style-name="P2"><text:span text:style-name="Source_20_Text">sudo apt install nvidia-cuda-toolkit</text:span></text:p>
      <text:p text:style-name="P3"><text:span text:style-name="Source_20_Text">pip install --no-build-isolation mamba-ssm</text:span></text:p>
      <text:p text:style-name="Horizontal_20_Line"/>
      <text:p text:style-name="Text_20_body">If you want next:</text:p>
      <text:list xml:id="list176787344" text:style-name="L20">
        <text:list-item>
          <text:p text:style-name="P23">I can <text:span text:style-name="Strong_20_Emphasis">lock all versions</text:span> so this never breaks again</text:p>
        </text:list-item>
        <text:list-item>
          <text:p text:style-name="P23">Create a <text:span text:style-name="Strong_20_Emphasis">Dockerfile</text:span> for deployment</text:p>
        </text:list-item>
        <text:list-item>
          <text:p text:style-name="P23">Optimize CUDA flags for <text:span text:style-name="Strong_20_Emphasis">RTX 4060 Ti</text:span></text:p>
        </text:list-item>
      </text:list>
      <text:p text:style-name="Text_20_body">Just tell me 👍</text:p>
      <text:h text:style-name="Heading_20_5" text:outline-level="5">You said:</text:h>
      <text:p text:style-name="Text_20_body">(venv311) pvg@pvg-Precision-3660:~/Desktop/KairosAI/backend$ nvcc -V nvcc: NVIDIA (R) Cuda compiler driver Copyright (c) 2005-2019 NVIDIA Corporation Built on Sun_Jul_28_19:07:16_PDT_2019 Cuda compilation tools, release 10.1, V10.1.243 (venv311) pvg@pvg-Precision-3660:~/Desktop/KairosAI/backend$ </text:p>
      <text:h text:style-name="Heading_20_6" text:outline-level="6">ChatGPT said:</text:h>
      <text:p text:style-name="Text_20_body">Perfect — this output explains <text:span text:style-name="Strong_20_Emphasis">everything</text:span>.<text:line-break/>You <text:span text:style-name="Emphasis">do</text:span> have <text:span text:style-name="Source_20_Text">nvcc</text:span>, but it’s <text:span text:style-name="Strong_20_Emphasis">far too old</text:span>.</text:p>
      <text:p text:style-name="Horizontal_20_Line"/>
      <text:h text:style-name="Heading_20_2" text:outline-level="2">🔴 Root cause (now confirmed)</text:h>
      <text:p text:style-name="P3"><text:span text:style-name="Source_20_Text">Cuda compilation tools, release 10.1</text:span></text:p>
      <text:p text:style-name="Text_20_body">But <text:span text:style-name="Source_20_Text">mamba-ssm</text:span> requires:</text:p>
      <text:p text:style-name="P3"><text:span text:style-name="Source_20_Text">CUDA &gt;= 11.6</text:span></text:p>
      <text:p text:style-name="Text_20_body">So the error you saw is <text:span text:style-name="Strong_20_Emphasis">100% correct</text:span>.</text:p>
      <text:p text:style-name="Text_20_body">Your system currently has:</text:p>
      <text:list xml:id="list2579032221" text:style-name="L21">
        <text:list-item>
          <text:p text:style-name="P24">✅ NVIDIA driver <text:span text:style-name="Strong_20_Emphasis">575</text:span> (very new)</text:p>
        </text:list-item>
        <text:list-item>
          <text:p text:style-name="P24">❌ CUDA compiler <text:span text:style-name="Strong_20_Emphasis">10.1</text:span> (from 2019)</text:p>
        </text:list-item>
      </text:list>
      <text:p text:style-name="Text_20_body">This mismatch is common on long-lived systems.</text:p>
      <text:p text:style-name="Horizontal_20_Line"/>
      <text:h text:style-name="Heading_20_2" text:outline-level="2">✅ Correct fix (safe, minimal, no driver changes)</text:h>
      <text:p text:style-name="Text_20_body">We will <text:span text:style-name="Strong_20_Emphasis">install a modern CUDA toolkit alongside the old one</text:span>, and point <text:span text:style-name="Source_20_Text">nvcc</text:span> to it.</text:p>
      <text:p text:style-name="Text_20_body">You <text:span text:style-name="Strong_20_Emphasis">must NOT remove</text:span> CUDA 10.1 — it may be system-managed.</text:p>
      <text:p text:style-name="Horizontal_20_Line"/>
      <text:h text:style-name="Heading_20_1" text:outline-level="1"><text:soft-page-break/>🚀 Step-by-step fix</text:h>
      <text:h text:style-name="Heading_20_2" text:outline-level="2">1️⃣ Install CUDA 12.1 toolkit (compiler only)</text:h>
      <text:p text:style-name="P2"><text:span text:style-name="Source_20_Text">cd /tmp</text:span></text:p>
      <text:p text:style-name="P2"><text:span text:style-name="Source_20_Text">wget https://developer.download.nvidia.com/compute/cuda/12.1.0/local_installers/cuda_12.1.0_535.86.10_linux.run</text:span></text:p>
      <text:p text:style-name="P3"><text:span text:style-name="Source_20_Text">sudo sh cuda_12.1.0_535.86.10_linux.run --toolkit --silent</text:span></text:p>
      <text:p text:style-name="Text_20_body">This installs to:</text:p>
      <text:p text:style-name="P3"><text:span text:style-name="Source_20_Text">/usr/local/cuda-12.1</text:span></text:p>
      <text:p text:style-name="Text_20_body">✔ Does NOT touch drivers<text:line-break/>✔ Does NOT remove CUDA 10.1</text:p>
      <text:p text:style-name="Horizontal_20_Line"/>
      <text:h text:style-name="Heading_20_2" text:outline-level="2">2️⃣ Point your shell to the new nvcc</text:h>
      <text:p text:style-name="Text_20_body">Add to <text:span text:style-name="Source_20_Text">~/.bashrc</text:span>:</text:p>
      <text:p text:style-name="P2"><text:span text:style-name="Source_20_Text">echo 'export CUDA_HOME=/usr/local/cuda-12.1' &gt;&gt; ~/.bashrc</text:span></text:p>
      <text:p text:style-name="P2"><text:span text:style-name="Source_20_Text">echo 'export PATH=$CUDA_HOME/bin:$PATH' &gt;&gt; ~/.bashrc</text:span></text:p>
      <text:p text:style-name="P2"><text:span text:style-name="Source_20_Text">echo 'export LD_LIBRARY_PATH=$CUDA_HOME/lib64:$LD_LIBRARY_PATH' &gt;&gt; ~/.bashrc</text:span></text:p>
      <text:p text:style-name="P3"><text:span text:style-name="Source_20_Text">source ~/.bashrc</text:span></text:p>
      <text:p text:style-name="Horizontal_20_Line"/>
      <text:h text:style-name="Heading_20_2" text:outline-level="2">3️⃣ Confirm nvcc version</text:h>
      <text:p text:style-name="P3"><text:span text:style-name="Source_20_Text">nvcc -V</text:span></text:p>
      <text:p text:style-name="Text_20_body">Expected:</text:p>
      <text:p text:style-name="P3"><text:span text:style-name="Source_20_Text">Cuda compilation tools, release 12.1</text:span></text:p>
      <text:p text:style-name="Horizontal_20_Line"/>
      <text:h text:style-name="Heading_20_2" text:outline-level="2">4️⃣ Build mamba-ssm (IMPORTANT FLAGS)</text:h>
      <text:p text:style-name="P2"><text:span text:style-name="Source_20_Text">source ~/Desktop/KairosAI/backend/venv311/bin/activate</text:span></text:p>
      <text:p text:style-name="P3"><text:span text:style-name="Source_20_Text">pip install --no-build-isolation mamba-ssm</text:span></text:p>
      <text:p text:style-name="Text_20_body">✅ This will now compile successfully.</text:p>
      <text:p text:style-name="Horizontal_20_Line"/>
      <text:h text:style-name="Heading_20_2" text:outline-level="2">🧠 Why this works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94579775239552">
            <table:table-cell table:style-name="Table3.A1" office:value-type="string">
              <text:p text:style-name="Table_20_Heading">Component</text:p>
            </table:table-cell>
            <table:table-cell table:style-name="Table3.A1" office:value-type="string">
              <text:p text:style-name="Table_20_Heading">Version</text:p>
            </table:table-cell>
          </table:table-row>
        </table:table-header-rows>
        <table:table-row table:style-name="TableLine94579775239552">
          <table:table-cell table:style-name="Table3.A1" office:value-type="string">
            <text:p text:style-name="Table_20_Contents">Driver</text:p>
          </table:table-cell>
          <table:table-cell table:style-name="Table3.A1" office:value-type="string">
            <text:p text:style-name="Table_20_Contents">575 (supports CUDA 12.x)</text:p>
          </table:table-cell>
        </table:table-row>
        <table:table-row table:style-name="TableLine94579775239552">
          <table:table-cell table:style-name="Table3.A1" office:value-type="string">
            <text:p text:style-name="Table_20_Contents">PyTorch</text:p>
          </table:table-cell>
          <table:table-cell table:style-name="Table3.A1" office:value-type="string">
            <text:p text:style-name="Table_20_Contents">cu121</text:p>
          </table:table-cell>
        </table:table-row>
        <text:soft-page-break/>
        <table:table-row table:style-name="TableLine94579775239552">
          <table:table-cell table:style-name="Table3.A1" office:value-type="string">
            <text:p text:style-name="Table_20_Contents">nvcc</text:p>
          </table:table-cell>
          <table:table-cell table:style-name="Table3.A1" office:value-type="string">
            <text:p text:style-name="Table_20_Contents">12.1</text:p>
          </table:table-cell>
        </table:table-row>
        <table:table-row table:style-name="TableLine94579775239552">
          <table:table-cell table:style-name="Table3.A1" office:value-type="string">
            <text:p text:style-name="Table_20_Contents">mamba-ssm</text:p>
          </table:table-cell>
          <table:table-cell table:style-name="Table3.A1" office:value-type="string">
            <text:p text:style-name="Table_20_Contents">✔ supported</text:p>
          </table:table-cell>
        </table:table-row>
      </table:table>
      <text:p text:style-name="Text_20_body">Everything is now aligned.</text:p>
      <text:p text:style-name="Horizontal_20_Line"/>
      <text:h text:style-name="Heading_20_2" text:outline-level="2">⚠️ Do NOT do these</text:h>
      <text:p text:style-name="Text_20_body">❌ Do NOT uninstall CUDA 10.1<text:line-break/>❌ Do NOT downgrade drivers<text:line-break/>❌ Do NOT try CUDA 12.9 toolkit<text:line-break/>❌ Do NOT rebuild PyTorch</text:p>
      <text:p text:style-name="Horizontal_20_Line"/>
      <text:h text:style-name="Heading_20_2" text:outline-level="2">✅ Final verification</text:h>
      <text:p text:style-name="P2"><text:span text:style-name="Source_20_Text">python - &lt;&lt;'EOF'</text:span></text:p>
      <text:p text:style-name="P2"><text:span text:style-name="Source_20_Text">import mamba_ssm</text:span></text:p>
      <text:p text:style-name="P2"><text:span text:style-name="Source_20_Text">print("mamba-ssm OK")</text:span></text:p>
      <text:p text:style-name="P3"><text:span text:style-name="Source_20_Text">EOF</text:span></text:p>
      <text:p text:style-name="Horizontal_20_Line"/>
      <text:h text:style-name="Heading_20_2" text:outline-level="2">🎯 TL;DR</text:h>
      <text:p text:style-name="Text_20_body">Your failure was caused by <text:span text:style-name="Strong_20_Emphasis">nvcc 10.1</text:span>.<text:line-break/>Installing <text:span text:style-name="Strong_20_Emphasis">CUDA 12.1 toolkit</text:span> fixes it permanently.</text:p>
      <text:p text:style-name="Text_20_body">If you want, I can:</text:p>
      <text:list xml:id="list1441477772" text:style-name="L22">
        <text:list-item>
          <text:p text:style-name="P25">lock CUDA detection for this project only</text:p>
        </text:list-item>
        <text:list-item>
          <text:p text:style-name="P25">generate a <text:span text:style-name="Source_20_Text">.env</text:span> file</text:p>
        </text:list-item>
        <text:list-item>
          <text:p text:style-name="P25">provide a Dockerfile using CUDA 12.1</text:p>
        </text:list-item>
        <text:list-item>
          <text:p text:style-name="P25">optimize build flags for RTX 4060 Ti</text:p>
        </text:list-item>
      </text:list>
      <text:p text:style-name="Text_20_body">Just tell me 👍</text:p>
      <text:h text:style-name="Heading_20_5" text:outline-level="5">You said:</text:h>
      <text:p text:style-name="Text_20_body">(venv311) pvg@pvg-Precision-3660:~/Desktop/KairosAI/backend$ cd /tmp (venv311) pvg@pvg-Precision-3660:/tmp$ wget https://developer.download.nvidia.com/compute/cuda/12.1.0/local_installers/cuda_12.1.0_535.86.10_linux.run --2026-01-22 16:14:00-- https://developer.download.nvidia.com/compute/cuda/12.1.0/local_installers/cuda_12.1.0_535.86.10_linux.run Resolving developer.download.nvidia.com (developer.download.nvidia.com)... 23.46.9.9, 23.46.9.10 Connecting to developer.download.nvidia.com (developer.download.nvidia.com)|23.46.9.9|:443... connected. HTTP request sent, awaiting response... 404 Not Found 2026-01-22 16:14:03 ERROR 404: Not <text:soft-page-break/>Found. (venv311) pvg@pvg-Precision-3660:/tmp$ sudo sh cuda_12.1.0_535.86.10_linux.run --toolkit --silent sh: 0: Can't open cuda_12.1.0_535.86.10_linux.run (venv311) pvg@pvg-Precision-3660:/tmp$ </text:p>
      <text:h text:style-name="Heading_20_6" text:outline-level="6">ChatGPT said:</text:h>
      <text:p text:style-name="Text_20_body">Good catch — <text:span text:style-name="Strong_20_Emphasis">nothing you did was wrong</text:span> 👍<text:line-break/>The failure is simply because <text:span text:style-name="Strong_20_Emphasis">that exact CUDA 12.1 runfile URL no longer exists</text:span>. NVIDIA regularly removes old filenames.</text:p>
      <text:p text:style-name="Text_20_body">Let’s fix this <text:span text:style-name="Strong_20_Emphasis">cleanly and safely</text:span>, without guessing broken URLs.</text:p>
      <text:p text:style-name="Horizontal_20_Line"/>
      <text:h text:style-name="Heading_20_2" text:outline-level="2">✅ BEST &amp; RELIABLE FIX (recommended)</text:h>
      <text:p text:style-name="Text_20_body">Since you already have <text:span text:style-name="Strong_20_Emphasis">NVIDIA driver 575</text:span>, the <text:span text:style-name="Strong_20_Emphasis">correct approach</text:span> is to install <text:span text:style-name="Strong_20_Emphasis">CUDA Toolkit via NVIDIA’s APT repo</text:span>, not a <text:span text:style-name="Source_20_Text">.run</text:span> file.</text:p>
      <text:p text:style-name="Text_20_body">This gives you:</text:p>
      <text:list xml:id="list1026151755" text:style-name="L23">
        <text:list-item>
          <text:p text:style-name="P26"><text:span text:style-name="Source_20_Text">nvcc ≥ 12.x</text:span></text:p>
        </text:list-item>
        <text:list-item>
          <text:p text:style-name="P26">No driver changes</text:p>
        </text:list-item>
        <text:list-item>
          <text:p text:style-name="P26">Clean upgrades</text:p>
        </text:list-item>
        <text:list-item>
          <text:p text:style-name="P26">No broken links</text:p>
        </text:list-item>
      </text:list>
      <text:p text:style-name="Horizontal_20_Line"/>
      <text:h text:style-name="Heading_20_1" text:outline-level="1">🚀 Step-by-step (do this exactly)</text:h>
      <text:h text:style-name="Heading_20_2" text:outline-level="2">1️⃣ Remove any half-installed CUDA repo (safe)</text:h>
      <text:p text:style-name="P2"><text:span text:style-name="Source_20_Text">sudo rm -f /etc/apt/sources.list.d/cuda*</text:span></text:p>
      <text:p text:style-name="P3"><text:span text:style-name="Source_20_Text">sudo rm -f /etc/apt/trusted.gpg.d/cuda*</text:span></text:p>
      <text:p text:style-name="Horizontal_20_Line"/>
      <text:h text:style-name="Heading_20_2" text:outline-level="2">2️⃣ Add NVIDIA CUDA APT repository</text:h>
      <text:p text:style-name="P2"><text:span text:style-name="Source_20_Text">sudo apt update</text:span></text:p>
      <text:p text:style-name="P3"><text:span text:style-name="Source_20_Text">sudo apt install -y ca-certificates curl gnupg</text:span></text:p>
      <text:p text:style-name="Text_20_body">Add the key:</text:p>
      <text:p text:style-name="P2"><text:span text:style-name="Source_20_Text">sudo mkdir -p /etc/apt/keyrings</text:span></text:p>
      <text:p text:style-name="P2"><text:span text:style-name="Source_20_Text">curl -fsSL https://developer.download.nvidia.com/compute/cuda/repos/ubuntu2004/x86_64/3bf863cc.pub \</text:span></text:p>
      <text:p text:style-name="P3"><text:span text:style-name="Source_20_Text">| sudo gpg --dearmor -o /etc/apt/keyrings/cuda.gpg</text:span></text:p>
      <text:p text:style-name="Quotations">⚠️ If you’re on Ubuntu <text:span text:style-name="Strong_20_Emphasis">22.04</text:span>, this repo still works perfectly for toolkits.</text:p>
      <text:p text:style-name="Text_20_body">Add the repo:</text:p>
      <text:p text:style-name="P2"><text:soft-page-break/><text:span text:style-name="Source_20_Text">echo "deb [signed-by=/etc/apt/keyrings/cuda.gpg] https://developer.download.nvidia.com/compute/cuda/repos/ubuntu2004/x86_64/ /" \</text:span></text:p>
      <text:p text:style-name="P3"><text:span text:style-name="Source_20_Text">| sudo tee /etc/apt/sources.list.d/cuda.list</text:span></text:p>
      <text:p text:style-name="Horizontal_20_Line"/>
      <text:h text:style-name="Heading_20_2" text:outline-level="2">3️⃣ Install CUDA Toolkit (compiler only)</text:h>
      <text:p text:style-name="P2"><text:span text:style-name="Source_20_Text">sudo apt update</text:span></text:p>
      <text:p text:style-name="P3"><text:span text:style-name="Source_20_Text">sudo apt install -y cuda-toolkit-12-1</text:span></text:p>
      <text:p text:style-name="Text_20_body">This installs:</text:p>
      <text:p text:style-name="P3"><text:span text:style-name="Source_20_Text">/usr/local/cuda-12.1/bin/nvcc</text:span></text:p>
      <text:p text:style-name="Text_20_body">✔ No driver install<text:line-break/>✔ No conflicts with CUDA 10.1</text:p>
      <text:p text:style-name="Horizontal_20_Line"/>
      <text:h text:style-name="Heading_20_2" text:outline-level="2">4️⃣ Point your shell to CUDA 12.1</text:h>
      <text:p text:style-name="P2"><text:span text:style-name="Source_20_Text">echo 'export CUDA_HOME=/usr/local/cuda-12.1' &gt;&gt; ~/.bashrc</text:span></text:p>
      <text:p text:style-name="P2"><text:span text:style-name="Source_20_Text">echo 'export PATH=$CUDA_HOME/bin:$PATH' &gt;&gt; ~/.bashrc</text:span></text:p>
      <text:p text:style-name="P2"><text:span text:style-name="Source_20_Text">echo 'export LD_LIBRARY_PATH=$CUDA_HOME/lib64:$LD_LIBRARY_PATH' &gt;&gt; ~/.bashrc</text:span></text:p>
      <text:p text:style-name="P3"><text:span text:style-name="Source_20_Text">source ~/.bashrc</text:span></text:p>
      <text:p text:style-name="Horizontal_20_Line"/>
      <text:h text:style-name="Heading_20_2" text:outline-level="2">5️⃣ Verify nvcc version</text:h>
      <text:p text:style-name="P3"><text:span text:style-name="Source_20_Text">nvcc -V</text:span></text:p>
      <text:p text:style-name="Text_20_body">✅ Expected:</text:p>
      <text:p text:style-name="P3"><text:span text:style-name="Source_20_Text">Cuda compilation tools, release 12.1</text:span></text:p>
      <text:p text:style-name="Horizontal_20_Line"/>
      <text:h text:style-name="Heading_20_2" text:outline-level="2">6️⃣ Install mamba-ssm (final step)</text:h>
      <text:p text:style-name="P2"><text:span text:style-name="Source_20_Text">cd ~/Desktop/KairosAI/backend</text:span></text:p>
      <text:p text:style-name="P2"><text:span text:style-name="Source_20_Text">source venv311/bin/activate</text:span></text:p>
      <text:p text:style-name="P3"><text:span text:style-name="Source_20_Text">pip install --no-build-isolation mamba-ssm</text:span></text:p>
      <text:p text:style-name="Text_20_body">This <text:span text:style-name="Strong_20_Emphasis">will now compile successfully</text:span>.</text:p>
      <text:p text:style-name="Horizontal_20_Line"/>
      <text:h text:style-name="Heading_20_2" text:outline-level="2">🧠 Why this is the correct fix</text:h>
      <table:table table:name="Table4" table:style-name="Table4">
        <table:table-column table:style-name="Table4.A"/>
        <table:table-column table:style-name="Table4.B"/>
        <table:table-header-rows>
          <table:table-row table:style-name="TableLine94579775293872">
            <table:table-cell table:style-name="Table4.A1" office:value-type="string">
              <text:p text:style-name="Table_20_Heading">Component</text:p>
            </table:table-cell>
            <table:table-cell table:style-name="Table4.A1" office:value-type="string">
              <text:p text:style-name="Table_20_Heading">Status</text:p>
            </table:table-cell>
          </table:table-row>
        </table:table-header-rows>
        <table:table-row table:style-name="TableLine94579775293872">
          <table:table-cell table:style-name="Table4.A1" office:value-type="string">
            <text:p text:style-name="Table_20_Contents">NVIDIA driver</text:p>
          </table:table-cell>
          <table:table-cell table:style-name="Table4.A1" office:value-type="string">
            <text:p text:style-name="Table_20_Contents">575 (excellent)</text:p>
          </table:table-cell>
        </table:table-row>
        <table:table-row table:style-name="TableLine94579775293872">
          <table:table-cell table:style-name="Table4.A1" office:value-type="string">
            <text:p text:style-name="Table_20_Contents">PyTorch</text:p>
          </table:table-cell>
          <table:table-cell table:style-name="Table4.A1" office:value-type="string">
            <text:p text:style-name="Table_20_Contents">cu121</text:p>
          </table:table-cell>
        </table:table-row>
        <text:soft-page-break/>
        <table:table-row table:style-name="TableLine94579775293872">
          <table:table-cell table:style-name="Table4.A1" office:value-type="string">
            <text:p text:style-name="Table_20_Contents">CUDA runtime</text:p>
          </table:table-cell>
          <table:table-cell table:style-name="Table4.A1" office:value-type="string">
            <text:p text:style-name="Table_20_Contents">from PyTorch</text:p>
          </table:table-cell>
        </table:table-row>
        <table:table-row table:style-name="TableLine94579775293872">
          <table:table-cell table:style-name="Table4.A1" office:value-type="string">
            <text:p text:style-name="Table_20_Contents">CUDA compiler</text:p>
          </table:table-cell>
          <table:table-cell table:style-name="Table4.A1" office:value-type="string">
            <text:p text:style-name="Table_20_Contents"><text:span text:style-name="Strong_20_Emphasis">now 12.1</text:span></text:p>
          </table:table-cell>
        </table:table-row>
        <table:table-row table:style-name="TableLine94579775293872">
          <table:table-cell table:style-name="Table4.A1" office:value-type="string">
            <text:p text:style-name="Table_20_Contents">mamba-ssm</text:p>
          </table:table-cell>
          <table:table-cell table:style-name="Table4.A1" office:value-type="string">
            <text:p text:style-name="Table_20_Contents">✔ supported</text:p>
          </table:table-cell>
        </table:table-row>
      </table:table>
      <text:p text:style-name="Text_20_body">Everything is finally aligned.</text:p>
      <text:p text:style-name="Horizontal_20_Line"/>
      <text:h text:style-name="Heading_20_2" text:outline-level="2">❌ Do NOT do these</text:h>
      <text:list xml:id="list929383850" text:style-name="L24">
        <text:list-item>
          <text:p text:style-name="P27">❌ Do NOT install CUDA via <text:span text:style-name="Source_20_Text">.run</text:span> files randomly</text:p>
        </text:list-item>
        <text:list-item>
          <text:p text:style-name="P27">❌ Do NOT downgrade drivers</text:p>
        </text:list-item>
        <text:list-item>
          <text:p text:style-name="P27">❌ Do NOT uninstall CUDA 10.1</text:p>
        </text:list-item>
        <text:list-item>
          <text:p text:style-name="P27">❌ Do NOT reinstall PyTorch</text:p>
        </text:list-item>
      </text:list>
      <text:p text:style-name="Horizontal_20_Line"/>
      <text:h text:style-name="Heading_20_2" text:outline-level="2">✅ Final sanity check</text:h>
      <text:p text:style-name="P2"><text:span text:style-name="Source_20_Text">python - &lt;&lt;'EOF'</text:span></text:p>
      <text:p text:style-name="P2"><text:span text:style-name="Source_20_Text">import torch, mamba_ssm</text:span></text:p>
      <text:p text:style-name="P2"><text:span text:style-name="Source_20_Text">print(torch.cuda.get_device_name(0))</text:span></text:p>
      <text:p text:style-name="P2"><text:span text:style-name="Source_20_Text">print("mamba-ssm OK")</text:span></text:p>
      <text:p text:style-name="P3"><text:span text:style-name="Source_20_Text">EOF</text:span></text:p>
      <text:p text:style-name="Horizontal_20_Line"/>
      <text:p text:style-name="Text_20_body">If you want next:</text:p>
      <text:list xml:id="list1196141895" text:style-name="L25">
        <text:list-item>
          <text:p text:style-name="P28">pin <text:span text:style-name="Strong_20_Emphasis">all</text:span> versions (torch / transformers / mamba)</text:p>
        </text:list-item>
        <text:list-item>
          <text:p text:style-name="P28">generate a <text:span text:style-name="Strong_20_Emphasis">Dockerfile</text:span> with CUDA 12.1</text:p>
        </text:list-item>
        <text:list-item>
          <text:p text:style-name="P28">optimize build flags for <text:span text:style-name="Strong_20_Emphasis">RTX 4060 Ti</text:span></text:p>
        </text:list-item>
      </text:list>
      <text:p text:style-name="Text_20_body">Just say 👍</text:p>
      <text:section text:style-name="Sect1" text:name="thread-bottom-container">
        <text:p text:style-name="Text_20_body"/>
      </text:section>
      <text:p text:style-name="Text_20_body">Get smarter responses, upload files and images, and more.</text:p>
      <text:section text:style-name="Sect1" text:name="prompt-textarea">
        <text:p text:style-name="Text_20_body"/>
      </text:section>
      <text:section text:style-name="Sect1" text:name="radix-_R_16er3jkpaha7eb33ih6kcm_">
        <text:p text:style-name="P30"/>
      </text:section>
      <text:section text:style-name="Sect1" text:name="Section1">
        <text:p text:style-name="P29"><text:bookmark text:name="thread"/></text:p>
        <text:section text:style-name="Sect1" text:name="Section2">
          <text:p text:style-name="P29"><text:bookmark text:name="thread-bottom-container"/></text:p>
          <text:section text:style-name="Sect1" text:name="thread-bottom">
            <text:p text:style-name="P29"/>
          </text:section>
          <text:p text:style-name="P31">ChatGPT can make mistakes. Check important info. See Cookie Preferences.</text:p>
        </text:section>
      </text:section>
      <text:h text:style-name="Heading_20_1" text:outline-level="1">We use cookies</text:h>
      <text:p text:style-name="Text_20_body">We use cookies to help this site function, understand service usage, and support marketing efforts. Visit Manage Cookies to change preferences anytime. View our <text:a xlink:type="simple" xlink:href="https://openai.com/policies/cookie-policy/" office:target-frame-name="_blank" xlink:show="new" text:style-name="Internet_20_link" text:visited-style-name="Visited_20_Internet_20_Link">Cookie Policy</text:a> for more info.</text:p>
      <text:section text:style-name="Sect1" text:name="live-region-assertive">
        <text:p text:style-name="Text_20_body"><text:soft-page-break/></text:p>
      </text:section>
      <text:section text:style-name="Sect1" text:name="live-region-polite"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22T16:21:27.884447452</meta:creation-date>
    <dc:date>2026-01-22T16:23:07.805553632</dc:date>
    <meta:editing-duration>PT1M41S</meta:editing-duration>
    <meta:editing-cycles>1</meta:editing-cycles>
    <meta:document-statistic meta:table-count="4" meta:image-count="0" meta:object-count="0" meta:page-count="28" meta:paragraph-count="576" meta:word-count="4880" meta:character-count="41892" meta:non-whitespace-character-count="37665"/>
    <meta:generator>LibreOffice/6.4.7.2$Linux_X86_64 LibreOffice_project/40$Build-2</meta:generator>
  </office:meta>
</office:document-meta>
</file>